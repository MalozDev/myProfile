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F000002AAB8C8C38B.png" manifest:media-type="image/png"/>
  <manifest:file-entry manifest:full-path="Pictures/10000001000003EF000002AA2BFAB8DC.png" manifest:media-type="image/png"/>
  <manifest:file-entry manifest:full-path="Pictures/10000001000003EF000002AA0D3549DD.png" manifest:media-type="image/png"/>
  <manifest:file-entry manifest:full-path="Pictures/10000001000003EF000002AA64A659D1.png" manifest:media-type="image/png"/>
  <manifest:file-entry manifest:full-path="Pictures/10000001000003EF000002AA07518D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SansPro" svg:font-family="SourceSansPr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025cm" fo:min-width="0.0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9pt" style:font-size-asian="19pt" style:font-size-complex="19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pt" style:font-size-asian="1pt" style:font-size-complex="1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SourceSansPro" fo:font-size="19pt" fo:font-weight="bold" style:font-name-asian="SourceSansPro" style:font-size-asian="19pt" style:font-weight-asian="bold" style:font-name-complex="SourceSansPro" style:font-size-complex="19pt" style:font-weight-complex="bold"/>
    </style:style>
    <style:style style:name="T2" style:family="text">
      <style:text-properties fo:color="#000000" loext:opacity="100%" style:font-name="SourceSansPro" fo:font-size="13pt" fo:font-weight="normal" style:font-name-asian="SourceSansPro" style:font-size-asian="13pt" style:font-weight-asian="normal" style:font-name-complex="SourceSansPro" style:font-size-complex="13pt" style:font-weight-complex="normal"/>
    </style:style>
    <style:style style:name="T3" style:family="text">
      <style:text-properties fo:color="#000000" loext:opacity="100%" style:font-name="SourceSansPro" fo:font-size="11pt" fo:font-weight="normal" style:font-name-asian="SourceSansPro" style:font-size-asian="11pt" style:font-weight-asian="normal" style:font-name-complex="SourceSansPro" style:font-size-complex="11pt" style:font-weight-complex="normal"/>
    </style:style>
    <style:style style:name="T4" style:family="text">
      <style:text-properties fo:color="#000000" loext:opacity="100%" style:font-name="SourceSansPro" fo:font-size="1pt" fo:font-weight="normal" style:font-name-asian="SourceSansPro" style:font-size-asian="1pt" style:font-weight-asian="normal" style:font-name-complex="SourceSansPro" style:font-size-complex="1pt" style:font-weight-complex="normal"/>
    </style:style>
    <style:style style:name="T5" style:family="text">
      <style:text-properties fo:color="#000000" loext:opacity="100%" style:font-name="SourceSansPro" fo:font-size="12pt" fo:font-weight="bold" style:font-name-asian="SourceSansPro" style:font-size-asian="12pt" style:font-weight-asian="bold" style:font-name-complex="SourceSansPro" style:font-size-complex="12pt" style:font-weight-complex="bold"/>
    </style:style>
    <style:style style:name="T6" style:family="text">
      <style:text-properties fo:color="#000000" loext:opacity="100%" style:font-name="SourceSansPro" fo:font-size="11pt" fo:font-weight="bold" style:font-name-asian="SourceSansPro" style:font-size-asian="11pt" style:font-weight-asian="bold" style:font-name-complex="SourceSansPro" style:font-size-complex="11pt" style:font-weight-complex="bold"/>
    </style:style>
    <style:style style:name="T7" style:family="text">
      <style:text-properties fo:color="#000000" loext:opacity="100%" style:font-name="SourceSansPro" fo:font-size="11pt" fo:font-style="italic" fo:font-weight="normal" style:font-name-asian="SourceSansPro" style:font-size-asian="11pt" style:font-style-asian="italic" style:font-weight-asian="normal" style:font-name-complex="SourceSansPro" style:font-size-complex="11pt" style:font-style-complex="italic" style:font-weight-complex="normal"/>
    </style:style>
    <style:style style:name="T8" style:family="text">
      <style:text-properties fo:color="#ffffff" loext:opacity="100%" style:font-name="SourceSansPro" fo:font-size="1pt" fo:font-weight="normal" style:font-name-asian="SourceSansPro" style:font-size-asian="1pt" style:font-weight-asian="normal" style:font-name-complex="SourceSansPro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17.806cm" svg:height="4.472cm" svg:x="1.587cm" svg:y="1.534cm" svg:viewBox="0 0 17807 4473" draw:points="0,0 17807,0 17807,4473 0,4473">
          <text:p/>
        </draw:polygon>
        <draw:frame draw:style-name="gr2" draw:text-style-name="P3" draw:layer="layout" svg:width="6.225cm" svg:height="0.911cm" svg:x="1.6cm" svg:y="1.427cm">
          <draw:text-box>
            <text:p text:style-name="P2"><text:span text:style-name="T1">Stepha</text:span><text:span text:style-name="T1">n </text:span><text:span text:style-name="T1">Malob</text:span><text:span text:style-name="T1">eka</text:span></text:p>
          </draw:text-box>
        </draw:frame>
        <draw:frame draw:style-name="gr3" draw:text-style-name="P4" draw:layer="layout" svg:width="18.074cm" svg:height="0.623cm" svg:x="1.6cm" svg:y="2.394cm">
          <draw:text-box>
            <text:p text:style-name="P2"><text:span text:style-name="T2">Computer </text:span><text:span text:style-name="T2">Systems </text:span><text:span text:style-name="T2">Engineer • </text:span><text:span text:style-name="T2">Full-Stack </text:span><text:span text:style-name="T2">JavaScript </text:span><text:span text:style-name="T2">Developer </text:span><text:span text:style-name="T2">• </text:span><text:span text:style-name="T2">Telecomm</text:span><text:span text:style-name="T2">unications </text:span></text:p>
          </draw:text-box>
        </draw:frame>
        <draw:path draw:style-name="gr4" draw:text-style-name="P5" draw:layer="layout" svg:width="0.331cm" svg:height="0.153cm" svg:x="1.615cm" svg:y="4.138cm" svg:viewBox="0 0 332 154" svg:d="M291 154c23 0 41-19 41-43v-111l-158 66c-3 1-5 1-8 1-4 0-6 0-8-1l-158-66v111c0 24 19 43 42 43z">
          <text:p/>
        </draw:path>
        <draw:path draw:style-name="gr4" draw:text-style-name="P5" draw:layer="layout" svg:width="0.331cm" svg:height="0.128cm" svg:x="1.615cm" svg:y="4.033cm" svg:viewBox="0 0 332 129" svg:d="M166 129l166-70v-16c0-24-18-43-41-43h-249c-23 0-42 19-42 43v16z">
          <text:p/>
        </draw:path>
        <draw:frame draw:style-name="gr3" draw:text-style-name="P4" draw:layer="layout" svg:width="1.924cm" svg:height="0.623cm" svg:x="1.6cm" svg:y="2.923cm">
          <draw:text-box>
            <text:p text:style-name="P2"><text:span text:style-name="T2">Engineer</text:span></text:p>
          </draw:text-box>
        </draw:frame>
        <draw:frame draw:style-name="gr5" draw:text-style-name="P6" draw:layer="layout" svg:width="4.024cm" svg:height="0.53cm" svg:x="2.215cm" svg:y="3.845cm">
          <draw:text-box>
            <text:p text:style-name="P2"><text:span text:style-name="T3">malozdev@</text:span><text:span text:style-name="T3">gmail.com</text:span></text:p>
          </draw:text-box>
        </draw:frame>
        <draw:path draw:style-name="gr4" draw:text-style-name="P5" draw:layer="layout" svg:width="0.355cm" svg:height="0.356cm" svg:x="6.392cm" svg:y="3.984cm" svg:viewBox="0 0 356 357" svg:d="M356 270l-16 70c-1 5-4 9-8 12s-8 5-13 5c-176 0-319-143-319-319 0-10 7-19 17-21l70-16c5-1 10-1 15 2 4 2 8 6 10 11l32 75c4 9 1 20-6 26l-37 31c24 49 61 86 111 111l31-38c3-4 7-6 11-7 5-1 10-1 14 1l75 32c10 4 15 15 13 25z">
          <text:p/>
        </draw:path>
        <draw:frame draw:style-name="gr6" draw:text-style-name="P7" draw:layer="layout" svg:width="0.025cm" svg:height="0.048cm" svg:x="5.818cm" svg:y="4.1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3.198cm" svg:height="0.53cm" svg:x="6.981cm" svg:y="3.845cm">
          <draw:text-box>
            <text:p text:style-name="P2"><text:span text:style-name="T3">+260 975 </text:span><text:span text:style-name="T3">623 742</text:span></text:p>
          </draw:text-box>
        </draw:frame>
        <draw:path draw:style-name="gr4" draw:text-style-name="P5" draw:layer="layout" svg:width="0.29cm" svg:height="0.388cm" svg:x="10.319cm" svg:y="3.968cm" svg:viewBox="0 0 291 389" svg:d="M145 389c-26-23-51-49-73-76-33-41-72-102-72-161 0-62 35-117 89-140 55-24 117-11 159 32 28 29 44 68 43 108 0 59-40 120-73 161-22 27-47 53-73 76zM145 86c-22 0-43 14-54 34-5 10-8 21-8 32 0 12 3 22 8 32 11 20 32 33 54 33 34 0 62-29 62-65s-28-66-62-66z">
          <text:p/>
        </draw:path>
        <draw:frame draw:style-name="gr6" draw:text-style-name="P7" draw:layer="layout" svg:width="0.025cm" svg:height="0.048cm" svg:x="9.72cm" svg:y="4.1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661cm" svg:height="0.53cm" svg:x="10.883cm" svg:y="3.845cm">
          <draw:text-box>
            <text:p text:style-name="P2"><text:span text:style-name="T3">Ndola, </text:span><text:span text:style-name="T3">Zambia</text:span></text:p>
          </draw:text-box>
        </draw:frame>
        <draw:path draw:style-name="gr4" draw:text-style-name="P5" draw:layer="layout" svg:width="0.388cm" svg:height="0.388cm" svg:x="13.811cm" svg:y="3.968cm" svg:viewBox="0 0 389 389" svg:d="M331 332h-58v-90c0-22-1-49-30-49-30 0-35 23-35 47v92h-57v-185h55v25h1c7-15 26-30 54-30 59 0 70 38 70 88zM86 121c-19 0-33-15-33-34 0-18 15-33 33-33s33 15 33 33c0 19-15 34-33 34zM115 332h-58v-185h58zM360 0h-332c-15 0-28 13-28 28v333c0 16 13 28 28 28h332c16 0 29-12 29-28v-333c0-15-13-28-29-28z">
          <text:p/>
        </draw:path>
        <draw:frame draw:style-name="gr6" draw:text-style-name="P7" draw:layer="layout" svg:width="0.025cm" svg:height="0.048cm" svg:x="13.253cm" svg:y="4.1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3.41cm" svg:height="0.53cm" svg:x="14.416cm" svg:y="3.845cm">
          <draw:text-box>
            <text:p text:style-name="P2"><text:span text:style-name="T3">Stephan </text:span><text:span text:style-name="T3">Malobeka</text:span></text:p>
          </draw:text-box>
        </draw:frame>
        <draw:path draw:style-name="gr4" draw:text-style-name="P5" draw:layer="layout" svg:width="0.388cm" svg:height="0.378cm" svg:x="1.587cm" svg:y="4.82cm" svg:viewBox="0 0 389 379" svg:d="M195 0c-108 0-195 87-195 194 0 85 56 159 133 185 9 1 13-5 13-10 0-4 0-17 0-33-54 12-66-26-66-26-9-22-21-29-21-29-18-12 1-12 1-12 20 1 30 21 30 21 17 30 45 21 56 16 2-12 7-21 14-27-45-5-90-21-90-96 0-21 8-38 20-52-2-4-9-24 2-51 0 0 16-5 53 20 17-4 33-6 50-7 16 1 33 3 48 7 37-25 53-20 53-20 11 27 4 47 2 51 12 14 20 31 20 52 0 75-45 91-88 96 6 7 13 19 13 37 0 26-1 47-1 53 0 5 4 11 14 9 77-25 133-99 133-184 0-107-87-194-194-194z">
          <text:p/>
        </draw:path>
        <draw:frame draw:style-name="gr6" draw:text-style-name="P7" draw:layer="layout" svg:width="0.025cm" svg:height="0.048cm" svg:x="17.42cm" svg:y="4.1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4.032cm" svg:height="0.53cm" svg:x="2.215cm" svg:y="4.692cm">
          <draw:text-box>
            <text:p text:style-name="P2"><text:span text:style-name="T3">github.com/</text:span><text:span text:style-name="T3">MalozDev</text:span></text:p>
          </draw:text-box>
        </draw:frame>
        <draw:polygon draw:style-name="gr4" draw:text-style-name="P5" draw:layer="layout" svg:width="17.806cm" svg:height="0.053cm" svg:x="1.587cm" svg:y="6.561cm" svg:viewBox="0 0 17807 54" draw:points="0,0 17807,0 17807,54 0,54">
          <text:p/>
        </draw:polygon>
        <draw:frame draw:style-name="gr6" draw:text-style-name="P7" draw:layer="layout" svg:width="0.025cm" svg:height="0.048cm" svg:x="5.76cm" svg:y="4.972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4.113cm" svg:height="0.577cm" svg:x="1.6cm" svg:y="5.95cm">
          <draw:text-box>
            <text:p text:style-name="P2"><text:span text:style-name="T5">Profession</text:span><text:span text:style-name="T5">al Profile</text:span></text:p>
          </draw:text-box>
        </draw:frame>
        <draw:frame draw:style-name="gr5" draw:text-style-name="P6" draw:layer="layout" svg:width="19.031cm" svg:height="0.53cm" svg:x="1.6cm" svg:y="6.782cm">
          <draw:text-box>
            <text:p text:style-name="P2"><text:span text:style-name="T3">Computer </text:span><text:span text:style-name="T3">Systems </text:span><text:span text:style-name="T3">Engineering </text:span><text:span text:style-name="T3">graduate </text:span><text:span text:style-name="T3">from the </text:span><text:span text:style-name="T3">University of </text:span><text:span text:style-name="T3">Zambia with </text:span><text:span text:style-name="T3">professional </text:span><text:span text:style-name="T3">experience </text:span><text:span text:style-name="T3">in </text:span></text:p>
          </draw:text-box>
        </draw:frame>
        <draw:frame draw:style-name="gr5" draw:text-style-name="P6" draw:layer="layout" svg:width="19.298cm" svg:height="0.53cm" svg:x="1.6cm" svg:y="7.285cm">
          <draw:text-box>
            <text:p text:style-name="P2"><text:span text:style-name="T3">telecommu</text:span><text:span text:style-name="T3">nications, </text:span><text:span text:style-name="T3">networking, </text:span><text:span text:style-name="T3">and full-</text:span><text:span text:style-name="T3">stack </text:span><text:span text:style-name="T3">software </text:span><text:span text:style-name="T3">developmen</text:span><text:span text:style-name="T3">t. I have </text:span><text:span text:style-name="T3">contributed </text:span><text:span text:style-name="T3">to mobile </text:span><text:span text:style-name="T3">core </text:span></text:p>
          </draw:text-box>
        </draw:frame>
        <draw:frame draw:style-name="gr5" draw:text-style-name="P6" draw:layer="layout" svg:width="18.282cm" svg:height="0.53cm" svg:x="1.6cm" svg:y="7.787cm">
          <draw:text-box>
            <text:p text:style-name="P2"><text:span text:style-name="T3">network </text:span><text:span text:style-name="T3">operations </text:span><text:span text:style-name="T3">and </text:span><text:span text:style-name="T3">broadband </text:span><text:span text:style-name="T3">deployment </text:span><text:span text:style-name="T3">through </text:span><text:span text:style-name="T3">roles at </text:span><text:span text:style-name="T3">Baicells </text:span><text:span text:style-name="T3">Technologie</text:span><text:span text:style-name="T3">s and a </text:span><text:span text:style-name="T3">major </text:span></text:p>
          </draw:text-box>
        </draw:frame>
        <draw:frame draw:style-name="gr5" draw:text-style-name="P6" draw:layer="layout" svg:width="5.539cm" svg:height="0.53cm" svg:x="1.6cm" svg:y="8.29cm">
          <draw:text-box>
            <text:p text:style-name="P2"><text:span text:style-name="T3">telecommu</text:span><text:span text:style-name="T3">nications </text:span><text:span text:style-name="T3">operator.</text:span></text:p>
          </draw:text-box>
        </draw:frame>
        <draw:frame draw:style-name="gr5" draw:text-style-name="P6" draw:layer="layout" svg:width="19.814cm" svg:height="0.53cm" svg:x="1.6cm" svg:y="8.793cm">
          <draw:text-box>
            <text:p text:style-name="P2"><text:span text:style-name="T3"><text:s/></text:span><text:span text:style-name="T3">My primary </text:span><text:span text:style-name="T3">programmi</text:span><text:span text:style-name="T3">ng language </text:span><text:span text:style-name="T3">is JavaScript, </text:span><text:span text:style-name="T3">with strong </text:span><text:span text:style-name="T3">experience </text:span><text:span text:style-name="T3">building </text:span><text:span text:style-name="T3">scalable </text:span><text:span text:style-name="T3">web </text:span><text:span text:style-name="T3">applications </text:span></text:p>
          </draw:text-box>
        </draw:frame>
        <draw:frame draw:style-name="gr5" draw:text-style-name="P6" draw:layer="layout" svg:width="18.874cm" svg:height="0.53cm" svg:x="1.6cm" svg:y="9.296cm">
          <draw:text-box>
            <text:p text:style-name="P2"><text:span text:style-name="T3">using </text:span><text:span text:style-name="T3">Node.js, </text:span><text:span text:style-name="T3">Express, </text:span><text:span text:style-name="T3">React, </text:span><text:span text:style-name="T3">PostgreSQL, </text:span><text:span text:style-name="T3">and </text:span><text:span text:style-name="T3">MongoDB. I </text:span><text:span text:style-name="T3">enjoy </text:span><text:span text:style-name="T3">solving real-</text:span><text:span text:style-name="T3">world </text:span><text:span text:style-name="T3">problems </text:span><text:span text:style-name="T3">through </text:span></text:p>
          </draw:text-box>
        </draw:frame>
        <draw:frame draw:style-name="gr5" draw:text-style-name="P6" draw:layer="layout" svg:width="15.5cm" svg:height="0.53cm" svg:x="1.6cm" svg:y="9.798cm">
          <draw:text-box>
            <text:p text:style-name="P2"><text:span text:style-name="T3">software </text:span><text:span text:style-name="T3">engineering</text:span><text:span text:style-name="T3">, </text:span><text:span text:style-name="T3">automation, </text:span><text:span text:style-name="T3">networking, </text:span><text:span text:style-name="T3">cloud </text:span><text:span text:style-name="T3">technologie</text:span><text:span text:style-name="T3">s, and IoT </text:span><text:span text:style-name="T3">systems.</text:span></text:p>
          </draw:text-box>
        </draw:frame>
        <draw:frame draw:style-name="gr5" draw:text-style-name="P6" draw:layer="layout" svg:width="19.335cm" svg:height="0.53cm" svg:x="1.6cm" svg:y="10.301cm">
          <draw:text-box>
            <text:p text:style-name="P2"><text:span text:style-name="T3"><text:s/></text:span><text:span text:style-name="T3">Known for </text:span><text:span text:style-name="T3">being highly </text:span><text:span text:style-name="T3">adaptable, </text:span><text:span text:style-name="T3">quick to </text:span><text:span text:style-name="T3">learn, and </text:span><text:span text:style-name="T3">committed </text:span><text:span text:style-name="T3">to delivering </text:span><text:span text:style-name="T3">quality </text:span><text:span text:style-name="T3">technical </text:span><text:span text:style-name="T3">solutions </text:span></text:p>
          </draw:text-box>
        </draw:frame>
        <draw:polygon draw:style-name="gr4" draw:text-style-name="P5" draw:layer="layout" svg:width="17.806cm" svg:height="0.053cm" svg:x="1.587cm" svg:y="12.461cm" svg:viewBox="0 0 17807 54" draw:points="0,0 17807,0 17807,54 0,54">
          <text:p/>
        </draw:polygon>
        <draw:frame draw:style-name="gr5" draw:text-style-name="P6" draw:layer="layout" svg:width="8.342cm" svg:height="0.53cm" svg:x="1.6cm" svg:y="10.804cm">
          <draw:text-box>
            <text:p text:style-name="P2"><text:span text:style-name="T3">while </text:span><text:span text:style-name="T3">continuousl</text:span><text:span text:style-name="T3">y expanding </text:span><text:span text:style-name="T3">my </text:span><text:span text:style-name="T3">knowledge.</text:span></text:p>
          </draw:text-box>
        </draw:frame>
        <draw:frame draw:style-name="gr7" draw:text-style-name="P8" draw:layer="layout" svg:width="5.035cm" svg:height="0.577cm" svg:x="1.6cm" svg:y="11.851cm">
          <draw:text-box>
            <text:p text:style-name="P2"><text:span text:style-name="T5">Profession</text:span><text:span text:style-name="T5">al </text:span><text:span text:style-name="T5">Experience</text:span></text:p>
          </draw:text-box>
        </draw:frame>
        <draw:frame draw:style-name="gr5" draw:text-style-name="P6" draw:layer="layout" svg:width="9.303cm" svg:height="0.53cm" svg:x="1.6cm" svg:y="12.709cm">
          <draw:text-box>
            <text:p text:style-name="P2"><text:span text:style-name="T6">Home </text:span><text:span text:style-name="T6">Broadband </text:span><text:span text:style-name="T6">Outdoor </text:span><text:span text:style-name="T6">Unit (ODU) </text:span><text:span text:style-name="T6">Installer, </text:span></text:p>
          </draw:text-box>
        </draw:frame>
        <draw:frame draw:style-name="gr5" draw:text-style-name="P6" draw:layer="layout" svg:width="7.656cm" svg:height="0.53cm" svg:x="1.6cm" svg:y="13.211cm">
          <draw:text-box>
            <text:p text:style-name="P2"><text:span text:style-name="T7">Telecommun</text:span><text:span text:style-name="T7">ications </text:span><text:span text:style-name="T7">Operator </text:span><text:span text:style-name="T7">(Confidential)</text:span></text:p>
          </draw:text-box>
        </draw:frame>
        <draw:frame draw:style-name="gr6" draw:text-style-name="P7" draw:layer="layout" svg:width="0.025cm" svg:height="0.048cm" svg:x="1.949cm" svg:y="14.1cm">
          <draw:text-box>
            <text:p text:style-name="P2"><text:span text:style-name="T8">•</text:span></text:p>
          </draw:text-box>
        </draw:frame>
        <draw:frame draw:style-name="gr5" draw:text-style-name="P6" draw:layer="layout" svg:width="10.458cm" svg:height="0.53cm" svg:x="1.949cm" svg:y="13.714cm">
          <draw:text-box>
            <text:p text:style-name="P2"><text:span text:style-name="T3">Install and </text:span><text:span text:style-name="T3">commission </text:span><text:span text:style-name="T3">outdoor </text:span><text:span text:style-name="T3">unit </text:span><text:span text:style-name="T3">broadband </text:span><text:span text:style-name="T3">systems.</text:span></text:p>
          </draw:text-box>
        </draw:frame>
        <draw:frame draw:style-name="gr6" draw:text-style-name="P7" draw:layer="layout" svg:width="0.025cm" svg:height="0.048cm" svg:x="1.949cm" svg:y="14.603cm">
          <draw:text-box>
            <text:p text:style-name="P2"><text:span text:style-name="T8">•</text:span></text:p>
          </draw:text-box>
        </draw:frame>
        <draw:frame draw:style-name="gr5" draw:text-style-name="P6" draw:layer="layout" svg:width="11.864cm" svg:height="0.53cm" svg:x="1.949cm" svg:y="14.217cm">
          <draw:text-box>
            <text:p text:style-name="P2"><text:span text:style-name="T3">Conduct </text:span><text:span text:style-name="T3">customer </text:span><text:span text:style-name="T3">site surveys </text:span><text:span text:style-name="T3">and </text:span><text:span text:style-name="T3">optimize </text:span><text:span text:style-name="T3">signal </text:span><text:span text:style-name="T3">performanc</text:span><text:span text:style-name="T3">e.</text:span></text:p>
          </draw:text-box>
        </draw:frame>
        <draw:frame draw:style-name="gr5" draw:text-style-name="P6" draw:layer="layout" svg:width="2.69cm" svg:height="0.53cm" svg:x="17.047cm" svg:y="12.709cm">
          <draw:text-box>
            <text:p text:style-name="P2"><text:span text:style-name="T3">2025 – </text:span><text:span text:style-name="T3">Present</text:span></text:p>
          </draw:text-box>
        </draw:frame>
        <draw:frame draw:style-name="gr6" draw:text-style-name="P7" draw:layer="layout" svg:width="0.025cm" svg:height="0.048cm" svg:x="1.949cm" svg:y="15.106cm">
          <draw:text-box>
            <text:p text:style-name="P2"><text:span text:style-name="T8">•</text:span></text:p>
          </draw:text-box>
        </draw:frame>
        <draw:frame draw:style-name="gr5" draw:text-style-name="P6" draw:layer="layout" svg:width="12.685cm" svg:height="0.53cm" svg:x="1.949cm" svg:y="14.72cm">
          <draw:text-box>
            <text:p text:style-name="P2"><text:span text:style-name="T3">Configure </text:span><text:span text:style-name="T3">customer </text:span><text:span text:style-name="T3">networking </text:span><text:span text:style-name="T3">equipment </text:span><text:span text:style-name="T3">and validate </text:span><text:span text:style-name="T3">connectivity.</text:span></text:p>
          </draw:text-box>
        </draw:frame>
        <draw:frame draw:style-name="gr6" draw:text-style-name="P7" draw:layer="layout" svg:width="0.025cm" svg:height="0.048cm" svg:x="1.949cm" svg:y="15.609cm">
          <draw:text-box>
            <text:p text:style-name="P2"><text:span text:style-name="T8">•</text:span></text:p>
          </draw:text-box>
        </draw:frame>
        <draw:frame draw:style-name="gr5" draw:text-style-name="P6" draw:layer="layout" svg:width="8.994cm" svg:height="0.53cm" svg:x="1.949cm" svg:y="15.222cm">
          <draw:text-box>
            <text:p text:style-name="P2"><text:span text:style-name="T3">Troublesho</text:span><text:span text:style-name="T3">ot </text:span><text:span text:style-name="T3">installation </text:span><text:span text:style-name="T3">and </text:span><text:span text:style-name="T3">connectivity </text:span><text:span text:style-name="T3">issues.</text:span></text:p>
          </draw:text-box>
        </draw:frame>
        <draw:frame draw:style-name="gr6" draw:text-style-name="P7" draw:layer="layout" svg:width="0.025cm" svg:height="0.048cm" svg:x="1.949cm" svg:y="16.111cm">
          <draw:text-box>
            <text:p text:style-name="P2"><text:span text:style-name="T8">•</text:span></text:p>
          </draw:text-box>
        </draw:frame>
        <draw:frame draw:style-name="gr5" draw:text-style-name="P6" draw:layer="layout" svg:width="12.101cm" svg:height="0.53cm" svg:x="1.949cm" svg:y="15.725cm">
          <draw:text-box>
            <text:p text:style-name="P2"><text:span text:style-name="T3">Ensure </text:span><text:span text:style-name="T3">high-quality </text:span><text:span text:style-name="T3">installations </text:span><text:span text:style-name="T3">and strong </text:span><text:span text:style-name="T3">customer </text:span><text:span text:style-name="T3">satisfaction.</text:span></text:p>
          </draw:text-box>
        </draw:frame>
        <draw:frame draw:style-name="gr6" draw:text-style-name="P7" draw:layer="layout" svg:width="0.025cm" svg:height="0.048cm" svg:x="1.949cm" svg:y="16.614cm">
          <draw:text-box>
            <text:p text:style-name="P2"><text:span text:style-name="T8">•</text:span></text:p>
          </draw:text-box>
        </draw:frame>
        <draw:frame draw:style-name="gr5" draw:text-style-name="P6" draw:layer="layout" svg:width="10.577cm" svg:height="0.53cm" svg:x="1.949cm" svg:y="16.228cm">
          <draw:text-box>
            <text:p text:style-name="P2"><text:span text:style-name="T3">Coordinate </text:span><text:span text:style-name="T3">with </text:span><text:span text:style-name="T3">technical </text:span><text:span text:style-name="T3">teams </text:span><text:span text:style-name="T3">during </text:span><text:span text:style-name="T3">service </text:span><text:span text:style-name="T3">activation.</text:span></text:p>
          </draw:text-box>
        </draw:frame>
        <draw:frame draw:style-name="gr5" draw:text-style-name="P6" draw:layer="layout" svg:width="11.703cm" svg:height="0.53cm" svg:x="1.6cm" svg:y="17.048cm">
          <draw:text-box>
            <text:p text:style-name="P2"><text:span text:style-name="T6">Telecommu</text:span><text:span text:style-name="T6">nications </text:span><text:span text:style-name="T6">Engineerin</text:span><text:span text:style-name="T6">g Intern, </text:span><text:span text:style-name="T7">Baicells </text:span><text:span text:style-name="T7">Technologies</text:span></text:p>
          </draw:text-box>
        </draw:frame>
        <draw:frame draw:style-name="gr5" draw:text-style-name="P6" draw:layer="layout" svg:width="15.267cm" svg:height="0.53cm" svg:x="1.6cm" svg:y="17.551cm">
          <draw:text-box>
            <text:p text:style-name="P2"><text:span text:style-name="T3">Supported </text:span><text:span text:style-name="T3">engineers </text:span><text:span text:style-name="T3">on the </text:span><text:span text:style-name="T3">Zedmobile </text:span><text:span text:style-name="T3">Core </text:span><text:span text:style-name="T3">Network, </text:span><text:span text:style-name="T3">gaining </text:span><text:span text:style-name="T3">practical </text:span><text:span text:style-name="T3">experience </text:span></text:p>
          </draw:text-box>
        </draw:frame>
        <draw:frame draw:style-name="gr5" draw:text-style-name="P6" draw:layer="layout" svg:width="14.222cm" svg:height="0.53cm" svg:x="1.6cm" svg:y="18.053cm">
          <draw:text-box>
            <text:p text:style-name="P2"><text:span text:style-name="T3">with </text:span><text:span text:style-name="T3">telecommu</text:span><text:span text:style-name="T3">nications </text:span><text:span text:style-name="T3">backbone </text:span><text:span text:style-name="T3">infrastructu</text:span><text:span text:style-name="T3">re and </text:span><text:span text:style-name="T3">enterprise </text:span><text:span text:style-name="T3">networking.</text:span></text:p>
          </draw:text-box>
        </draw:frame>
        <draw:frame draw:style-name="gr6" draw:text-style-name="P7" draw:layer="layout" svg:width="0.025cm" svg:height="0.048cm" svg:x="1.949cm" svg:y="18.942cm">
          <draw:text-box>
            <text:p text:style-name="P2"><text:span text:style-name="T8">•</text:span></text:p>
          </draw:text-box>
        </draw:frame>
        <draw:frame draw:style-name="gr5" draw:text-style-name="P6" draw:layer="layout" svg:width="8.765cm" svg:height="0.53cm" svg:x="1.949cm" svg:y="18.556cm">
          <draw:text-box>
            <text:p text:style-name="P2"><text:span text:style-name="T3">Assisted </text:span><text:span text:style-name="T3">with </text:span><text:span text:style-name="T3">monitoring </text:span><text:span text:style-name="T3">core </text:span><text:span text:style-name="T3">network </text:span><text:span text:style-name="T3">systems.</text:span></text:p>
          </draw:text-box>
        </draw:frame>
        <draw:frame draw:style-name="gr6" draw:text-style-name="P7" draw:layer="layout" svg:width="0.025cm" svg:height="0.048cm" svg:x="1.949cm" svg:y="19.445cm">
          <draw:text-box>
            <text:p text:style-name="P2"><text:span text:style-name="T8">•</text:span></text:p>
          </draw:text-box>
        </draw:frame>
        <draw:frame draw:style-name="gr5" draw:text-style-name="P6" draw:layer="layout" svg:width="11.754cm" svg:height="0.53cm" svg:x="1.949cm" svg:y="19.059cm">
          <draw:text-box>
            <text:p text:style-name="P2"><text:span text:style-name="T3">Participated </text:span><text:span text:style-name="T3">in network </text:span><text:span text:style-name="T3">troubleshoo</text:span><text:span text:style-name="T3">ting and </text:span><text:span text:style-name="T3">incident </text:span><text:span text:style-name="T3">resolution.</text:span></text:p>
          </draw:text-box>
        </draw:frame>
        <draw:frame draw:style-name="gr6" draw:text-style-name="P7" draw:layer="layout" svg:width="0.025cm" svg:height="0.048cm" svg:x="1.949cm" svg:y="19.948cm">
          <draw:text-box>
            <text:p text:style-name="P2"><text:span text:style-name="T8">•</text:span></text:p>
          </draw:text-box>
        </draw:frame>
        <draw:frame draw:style-name="gr5" draw:text-style-name="P6" draw:layer="layout" svg:width="9.806cm" svg:height="0.53cm" svg:x="1.949cm" svg:y="19.561cm">
          <draw:text-box>
            <text:p text:style-name="P2"><text:span text:style-name="T3">Supported </text:span><text:span text:style-name="T3">infrastructu</text:span><text:span text:style-name="T3">re </text:span><text:span text:style-name="T3">maintenanc</text:span><text:span text:style-name="T3">e and </text:span><text:span text:style-name="T3">upgrades.</text:span></text:p>
          </draw:text-box>
        </draw:frame>
        <draw:frame draw:style-name="gr6" draw:text-style-name="P7" draw:layer="layout" svg:width="0.025cm" svg:height="0.048cm" svg:x="1.949cm" svg:y="20.45cm">
          <draw:text-box>
            <text:p text:style-name="P2"><text:span text:style-name="T8">•</text:span></text:p>
          </draw:text-box>
        </draw:frame>
        <draw:frame draw:style-name="gr5" draw:text-style-name="P6" draw:layer="layout" svg:width="12.431cm" svg:height="0.53cm" svg:x="1.949cm" svg:y="20.064cm">
          <draw:text-box>
            <text:p text:style-name="P2"><text:span text:style-name="T3">Studied </text:span><text:span text:style-name="T3">mobile </text:span><text:span text:style-name="T3">telecommu</text:span><text:span text:style-name="T3">nications </text:span><text:span text:style-name="T3">architecture </text:span><text:span text:style-name="T3">and best </text:span><text:span text:style-name="T3">practices.</text:span></text:p>
          </draw:text-box>
        </draw:frame>
        <draw:frame draw:style-name="gr6" draw:text-style-name="P7" draw:layer="layout" svg:width="0.025cm" svg:height="0.048cm" svg:x="1.949cm" svg:y="20.953cm">
          <draw:text-box>
            <text:p text:style-name="P2"><text:span text:style-name="T8">•</text:span></text:p>
          </draw:text-box>
        </draw:frame>
        <draw:polygon draw:style-name="gr4" draw:text-style-name="P5" draw:layer="layout" svg:width="17.806cm" svg:height="0.053cm" svg:x="1.587cm" svg:y="22.224cm" svg:viewBox="0 0 17807 54" draw:points="0,0 17807,0 17807,54 0,54">
          <text:p/>
        </draw:polygon>
        <draw:frame draw:style-name="gr5" draw:text-style-name="P6" draw:layer="layout" svg:width="9.464cm" svg:height="0.53cm" svg:x="1.949cm" svg:y="20.567cm">
          <draw:text-box>
            <text:p text:style-name="P2"><text:span text:style-name="T3">Collaborate</text:span><text:span text:style-name="T3">d closely </text:span><text:span text:style-name="T3">with senior </text:span><text:span text:style-name="T3">network </text:span><text:span text:style-name="T3">engineers.</text:span></text:p>
          </draw:text-box>
        </draw:frame>
        <draw:frame draw:style-name="gr7" draw:text-style-name="P8" draw:layer="layout" svg:width="2.11cm" svg:height="0.577cm" svg:x="1.6cm" svg:y="21.614cm">
          <draw:text-box>
            <text:p text:style-name="P2"><text:span text:style-name="T5">Education</text:span></text:p>
          </draw:text-box>
        </draw:frame>
        <draw:frame draw:style-name="gr5" draw:text-style-name="P6" draw:layer="layout" svg:width="10.666cm" svg:height="0.53cm" svg:x="1.6cm" svg:y="22.472cm">
          <draw:text-box>
            <text:p text:style-name="P2"><text:span text:style-name="T6">Bachelor of </text:span><text:span text:style-name="T6">Science in </text:span><text:span text:style-name="T6">Computer </text:span><text:span text:style-name="T6">Systems </text:span><text:span text:style-name="T6">Engineerin</text:span><text:span text:style-name="T6">g, </text:span></text:p>
          </draw:text-box>
        </draw:frame>
        <draw:frame draw:style-name="gr5" draw:text-style-name="P6" draw:layer="layout" svg:width="4.853cm" svg:height="0.53cm" svg:x="1.6cm" svg:y="22.975cm">
          <draw:text-box>
            <text:p text:style-name="P2"><text:span text:style-name="T7">University of </text:span><text:span text:style-name="T7">Zambia </text:span><text:span text:style-name="T7">(UNZA)</text:span></text:p>
          </draw:text-box>
        </draw:frame>
        <draw:frame draw:style-name="gr5" draw:text-style-name="P6" draw:layer="layout" svg:width="3.986cm" svg:height="0.53cm" svg:x="1.6cm" svg:y="23.477cm">
          <draw:text-box>
            <text:p text:style-name="P2"><text:span text:style-name="T3">Relevant </text:span><text:span text:style-name="T3">Coursework:</text:span></text:p>
          </draw:text-box>
        </draw:frame>
        <draw:frame draw:style-name="gr6" draw:text-style-name="P7" draw:layer="layout" svg:width="0.025cm" svg:height="0.048cm" svg:x="1.949cm" svg:y="24.366cm">
          <draw:text-box>
            <text:p text:style-name="P2"><text:span text:style-name="T8">•</text:span></text:p>
          </draw:text-box>
        </draw:frame>
        <draw:frame draw:style-name="gr5" draw:text-style-name="P6" draw:layer="layout" svg:width="3.211cm" svg:height="0.53cm" svg:x="1.949cm" svg:y="23.98cm">
          <draw:text-box>
            <text:p text:style-name="P2"><text:span text:style-name="T3">Cloud </text:span><text:span text:style-name="T3">Computing</text:span></text:p>
          </draw:text-box>
        </draw:frame>
        <draw:frame draw:style-name="gr5" draw:text-style-name="P6" draw:layer="layout" svg:width="0.891cm" svg:height="0.53cm" svg:x="18.628cm" svg:y="22.472cm">
          <draw:text-box>
            <text:p text:style-name="P2"><text:span text:style-name="T3">2026</text:span></text:p>
          </draw:text-box>
        </draw:frame>
        <draw:frame draw:style-name="gr6" draw:text-style-name="P7" draw:layer="layout" svg:width="0.025cm" svg:height="0.048cm" svg:x="1.949cm" svg:y="24.869cm">
          <draw:text-box>
            <text:p text:style-name="P2"><text:span text:style-name="T8">•</text:span></text:p>
          </draw:text-box>
        </draw:frame>
        <draw:frame draw:style-name="gr5" draw:text-style-name="P6" draw:layer="layout" svg:width="3.664cm" svg:height="0.53cm" svg:x="1.949cm" svg:y="24.483cm">
          <draw:text-box>
            <text:p text:style-name="P2"><text:span text:style-name="T3">Distributed </text:span><text:span text:style-name="T3">Systems</text:span></text:p>
          </draw:text-box>
        </draw:frame>
        <draw:frame draw:style-name="gr6" draw:text-style-name="P7" draw:layer="layout" svg:width="0.025cm" svg:height="0.048cm" svg:x="1.949cm" svg:y="25.372cm">
          <draw:text-box>
            <text:p text:style-name="P2"><text:span text:style-name="T8">•</text:span></text:p>
          </draw:text-box>
        </draw:frame>
        <draw:frame draw:style-name="gr5" draw:text-style-name="P6" draw:layer="layout" svg:width="3.702cm" svg:height="0.53cm" svg:x="1.949cm" svg:y="24.985cm">
          <draw:text-box>
            <text:p text:style-name="P2"><text:span text:style-name="T3">Computer </text:span><text:span text:style-name="T3">Networks</text:span></text:p>
          </draw:text-box>
        </draw:frame>
        <draw:frame draw:style-name="gr6" draw:text-style-name="P7" draw:layer="layout" svg:width="0.025cm" svg:height="0.048cm" svg:x="1.949cm" svg:y="25.874cm">
          <draw:text-box>
            <text:p text:style-name="P2"><text:span text:style-name="T8">•</text:span></text:p>
          </draw:text-box>
        </draw:frame>
        <draw:frame draw:style-name="gr5" draw:text-style-name="P6" draw:layer="layout" svg:width="3.736cm" svg:height="0.53cm" svg:x="1.949cm" svg:y="25.488cm">
          <draw:text-box>
            <text:p text:style-name="P2"><text:span text:style-name="T3">Artificial </text:span><text:span text:style-name="T3">Intelligence</text:span></text:p>
          </draw:text-box>
        </draw:frame>
        <draw:frame draw:style-name="gr6" draw:text-style-name="P7" draw:layer="layout" svg:width="0.025cm" svg:height="0.048cm" svg:x="1.949cm" svg:y="26.377cm">
          <draw:text-box>
            <text:p text:style-name="P2"><text:span text:style-name="T8">•</text:span></text:p>
          </draw:text-box>
        </draw:frame>
        <draw:frame draw:style-name="gr5" draw:text-style-name="P6" draw:layer="layout" svg:width="5.171cm" svg:height="0.53cm" svg:x="1.949cm" svg:y="25.991cm">
          <draw:text-box>
            <text:p text:style-name="P2"><text:span text:style-name="T3">Data Mining </text:span><text:span text:style-name="T3">&amp; </text:span><text:span text:style-name="T3">Warehousin</text:span><text:span text:style-name="T3">g</text:span></text:p>
          </draw:text-box>
        </draw:frame>
        <draw:frame draw:style-name="gr6" draw:text-style-name="P7" draw:layer="layout" svg:width="0.025cm" svg:height="0.048cm" svg:x="1.949cm" svg:y="26.88cm">
          <draw:text-box>
            <text:p text:style-name="P2"><text:span text:style-name="T8">•</text:span></text:p>
          </draw:text-box>
        </draw:frame>
        <draw:frame draw:style-name="gr5" draw:text-style-name="P6" draw:layer="layout" svg:width="3.393cm" svg:height="0.53cm" svg:x="1.949cm" svg:y="26.493cm">
          <draw:text-box>
            <text:p text:style-name="P2"><text:span text:style-name="T3">Wireless </text:span><text:span text:style-name="T3">Networks</text:span></text:p>
          </draw:text-box>
        </draw:frame>
        <draw:frame draw:style-name="gr6" draw:text-style-name="P7" draw:layer="layout" svg:width="0.025cm" svg:height="0.048cm" svg:x="1.949cm" svg:y="27.383cm">
          <draw:text-box>
            <text:p text:style-name="P2"><text:span text:style-name="T8">•</text:span></text:p>
          </draw:text-box>
        </draw:frame>
        <draw:frame draw:style-name="gr5" draw:text-style-name="P6" draw:layer="layout" svg:width="3.588cm" svg:height="0.53cm" svg:x="1.949cm" svg:y="26.996cm">
          <draw:text-box>
            <text:p text:style-name="P2"><text:span text:style-name="T3">Embedded </text:span><text:span text:style-name="T3">Systems</text:span></text:p>
          </draw:text-box>
        </draw:frame>
        <draw:frame draw:style-name="gr6" draw:text-style-name="P7" draw:layer="layout" svg:width="0.025cm" svg:height="0.048cm" svg:x="1.949cm" svg:y="27.885cm">
          <draw:text-box>
            <text:p text:style-name="P2"><text:span text:style-name="T8">•</text:span></text:p>
          </draw:text-box>
        </draw:frame>
        <draw:path draw:style-name="gr4" draw:text-style-name="P5" draw:layer="layout" svg:width="0.106cm" svg:height="0.106cm" svg:x="1.64cm" svg:y="13.977cm" svg:viewBox="0 0 107 107" svg:d="M107 54c0 7-2 14-4 20-3 7-7 13-13 18-5 5-10 8-17 11-6 3-13 4-20 4s-14-1-20-4c-7-3-13-6-18-11s-8-11-11-18c-3-6-4-13-4-20s1-15 4-21c3-7 6-12 11-17s11-9 18-12c6-2 13-4 20-4s14 2 20 4c7 3 12 7 17 12 6 5 10 10 13 17 2 6 4 14 4 21z">
          <text:p/>
        </draw:path>
        <draw:path draw:style-name="gr4" draw:text-style-name="P5" draw:layer="layout" svg:width="0.106cm" svg:height="0.106cm" svg:x="1.64cm" svg:y="14.48cm" svg:viewBox="0 0 107 107" svg:d="M107 53c0 7-2 15-4 21-3 7-7 12-13 17-5 5-10 9-17 12-6 2-13 4-20 4s-14-2-20-4c-7-3-13-7-18-12s-8-10-11-17c-3-6-4-14-4-21s1-14 4-20c3-7 6-13 11-18 5-4 11-8 18-11 6-3 13-4 20-4s14 1 20 4c7 3 12 7 17 11 6 5 10 11 13 18 2 6 4 13 4 20z">
          <text:p/>
        </draw:path>
        <draw:path draw:style-name="gr4" draw:text-style-name="P5" draw:layer="layout" svg:width="0.106cm" svg:height="0.106cm" svg:x="1.64cm" svg:y="14.983cm" svg:viewBox="0 0 107 107" svg:d="M107 53c0 7-2 13-4 20-3 6-7 13-13 18-5 5-10 9-17 11-6 3-13 5-20 5s-14-2-20-5c-7-2-13-6-18-11s-8-12-11-18c-3-7-4-13-4-20s1-14 4-21c3-6 6-12 11-17s11-9 18-11c6-3 13-4 20-4s14 1 20 4c7 2 12 6 17 11 6 5 10 11 13 17 2 7 4 14 4 21z">
          <text:p/>
        </draw:path>
        <draw:path draw:style-name="gr4" draw:text-style-name="P5" draw:layer="layout" svg:width="0.106cm" svg:height="0.106cm" svg:x="1.64cm" svg:y="15.485cm" svg:viewBox="0 0 107 107" svg:d="M107 54c0 7-2 14-4 21-3 6-7 12-13 17-5 5-10 9-17 11-6 3-13 4-20 4s-14-1-20-4c-7-2-13-6-18-11s-8-11-11-17c-3-7-4-14-4-21s1-13 4-20c3-6 6-12 11-17s11-9 18-12c6-3 13-5 20-5s14 2 20 5c7 3 12 7 17 12 6 5 10 11 13 17 2 7 4 13 4 20z">
          <text:p/>
        </draw:path>
        <draw:path draw:style-name="gr4" draw:text-style-name="P5" draw:layer="layout" svg:width="0.106cm" svg:height="0.106cm" svg:x="1.64cm" svg:y="15.988cm" svg:viewBox="0 0 107 107" svg:d="M107 54c0 7-2 14-4 20-3 7-7 12-13 17-5 5-10 9-17 12-6 3-13 4-20 4s-14-1-20-4c-7-3-13-7-18-12s-8-10-11-17c-3-6-4-13-4-20s1-14 4-20c3-7 6-13 11-18s11-9 18-12c6-3 13-4 20-4s14 1 20 4c7 3 12 7 17 12 6 5 10 11 13 18 2 6 4 13 4 20z">
          <text:p/>
        </draw:path>
        <draw:path draw:style-name="gr4" draw:text-style-name="P5" draw:layer="layout" svg:width="0.106cm" svg:height="0.106cm" svg:x="1.64cm" svg:y="16.491cm" svg:viewBox="0 0 107 107" svg:d="M107 54c0 7-2 13-4 20-3 6-7 12-13 17-5 5-10 9-17 12-6 2-13 4-20 4s-14-2-20-4c-7-3-13-7-18-12s-8-11-11-17c-3-7-4-13-4-20 0-8 1-15 4-22 3-6 6-12 11-17s11-8 18-11c6-3 13-4 20-4s14 1 20 4c7 3 12 6 17 11 6 5 10 11 13 17 2 7 4 14 4 22z">
          <text:p/>
        </draw:path>
        <draw:path draw:style-name="gr4" draw:text-style-name="P5" draw:layer="layout" svg:width="0.106cm" svg:height="0.106cm" svg:x="1.64cm" svg:y="18.819cm" svg:viewBox="0 0 107 107" svg:d="M107 54c0 7-2 14-4 20-3 7-7 13-13 17-5 5-10 9-17 12-6 3-13 4-20 4s-14-1-20-4c-7-3-13-7-18-12-5-4-8-10-11-17-3-6-4-13-4-20s1-14 4-20c3-8 6-13 11-18s11-9 18-12c6-3 13-4 20-4s14 1 20 4c7 3 12 7 17 12 6 5 10 10 13 18 2 6 4 13 4 20z">
          <text:p/>
        </draw:path>
        <draw:path draw:style-name="gr4" draw:text-style-name="P5" draw:layer="layout" svg:width="0.106cm" svg:height="0.106cm" svg:x="1.64cm" svg:y="19.322cm" svg:viewBox="0 0 107 107" svg:d="M107 54c0 7-2 14-4 20-3 6-7 12-13 17-5 5-10 9-17 12-6 2-13 4-20 4s-14-2-20-4c-7-3-13-7-18-12s-8-11-11-17-4-13-4-20c0-8 1-15 4-21 3-7 6-13 11-18s11-8 18-11c6-3 13-4 20-4s14 1 20 4c7 3 12 6 17 11 6 5 10 11 13 18 2 6 4 13 4 21z">
          <text:p/>
        </draw:path>
        <draw:path draw:style-name="gr4" draw:text-style-name="P5" draw:layer="layout" svg:width="0.106cm" svg:height="0.105cm" svg:x="1.64cm" svg:y="19.825cm" svg:viewBox="0 0 107 106" svg:d="M107 52c0 7-2 14-4 22-3 6-7 12-13 17-5 5-10 9-17 11-6 3-13 4-20 4s-14-1-20-4c-7-2-13-6-18-11s-8-11-11-17c-3-8-4-15-4-22s1-13 4-20c3-6 6-12 11-17s11-9 18-11c6-3 13-4 20-4s14 1 20 4c7 2 12 6 17 11 6 5 10 11 13 17 2 7 4 13 4 20z">
          <text:p/>
        </draw:path>
        <draw:path draw:style-name="gr4" draw:text-style-name="P5" draw:layer="layout" svg:width="0.106cm" svg:height="0.106cm" svg:x="1.64cm" svg:y="20.327cm" svg:viewBox="0 0 107 107" svg:d="M107 53c0 7-2 14-4 20-3 7-7 13-13 18-5 6-10 9-17 12-6 3-13 4-20 4s-14-1-20-4c-7-3-13-6-18-12-5-5-8-11-11-18-3-6-4-13-4-20s1-14 4-20c3-7 6-12 11-17s11-9 18-12c6-2 13-4 20-4s14 2 20 4c7 3 12 7 17 12 6 5 10 10 13 17 2 6 4 13 4 20z">
          <text:p/>
        </draw:path>
        <draw:path draw:style-name="gr4" draw:text-style-name="P5" draw:layer="layout" svg:width="0.106cm" svg:height="0.106cm" svg:x="1.64cm" svg:y="20.83cm" svg:viewBox="0 0 107 107" svg:d="M107 54c0 7-2 14-4 20-3 7-7 12-13 17-5 5-10 9-17 12-6 2-13 4-20 4s-14-2-20-4c-7-3-13-7-18-12s-8-10-11-17c-3-6-4-13-4-20s1-14 4-20c3-7 6-13 11-18s11-9 18-12c6-3 13-4 20-4s14 1 20 4c7 3 12 7 17 12 6 5 10 11 13 18 2 6 4 13 4 20z">
          <text:p/>
        </draw:path>
        <draw:path draw:style-name="gr4" draw:text-style-name="P5" draw:layer="layout" svg:width="0.106cm" svg:height="0.106cm" svg:x="1.64cm" svg:y="24.243cm" svg:viewBox="0 0 107 107" svg:d="M107 53c0 7-2 15-4 21-3 7-7 12-13 17-5 5-10 9-17 12-6 3-13 4-20 4s-14-1-20-4c-7-3-13-7-18-12s-8-10-11-17c-3-6-4-14-4-21s1-14 4-20c3-7 6-12 11-17s11-9 18-12c6-3 13-4 20-4s14 1 20 4c7 3 12 7 17 12 6 5 10 10 13 17 2 6 4 13 4 20z">
          <text:p/>
        </draw:path>
        <draw:path draw:style-name="gr4" draw:text-style-name="P5" draw:layer="layout" svg:width="0.106cm" svg:height="0.106cm" svg:x="1.64cm" svg:y="24.746cm" svg:viewBox="0 0 107 107" svg:d="M107 53c0 7-2 13-4 20-3 6-7 12-13 18-5 5-10 9-17 12-6 2-13 4-20 4s-14-2-20-4c-7-3-13-7-18-12-5-6-8-12-11-18-3-7-4-13-4-20s1-14 4-21c3-6 6-12 11-17s11-8 18-11c6-3 13-4 20-4s14 1 20 4c7 3 12 6 17 11 6 5 10 11 13 17 2 7 4 14 4 21z">
          <text:p/>
        </draw:path>
        <draw:path draw:style-name="gr4" draw:text-style-name="P5" draw:layer="layout" svg:width="0.106cm" svg:height="0.105cm" svg:x="1.64cm" svg:y="25.249cm" svg:viewBox="0 0 107 106" svg:d="M107 53c0 7-2 14-4 21-3 6-7 12-13 17-5 5-10 9-17 11-6 3-13 4-20 4s-14-1-20-4c-7-2-13-6-18-11s-8-11-11-17c-3-7-4-14-4-21s1-13 4-20c3-6 6-12 11-17s11-9 18-11c6-4 13-5 20-5s14 1 20 5c7 2 12 6 17 11 6 5 10 11 13 17 2 7 4 13 4 20z">
          <text:p/>
        </draw:path>
        <draw:path draw:style-name="gr4" draw:text-style-name="P5" draw:layer="layout" svg:width="0.106cm" svg:height="0.106cm" svg:x="1.64cm" svg:y="25.751cm" svg:viewBox="0 0 107 107" svg:d="M107 54c0 7-2 14-4 20-3 7-7 13-13 18-5 5-10 8-17 11-6 3-13 4-20 4s-14-1-20-4c-7-3-13-6-18-11s-8-11-11-18c-3-6-4-13-4-20s1-14 4-20c3-8 6-13 11-18s11-9 18-12c6-2 13-4 20-4s14 2 20 4c7 3 12 7 17 12 6 5 10 10 13 18 2 6 4 13 4 20z">
          <text:p/>
        </draw:path>
        <draw:path draw:style-name="gr4" draw:text-style-name="P5" draw:layer="layout" svg:width="0.106cm" svg:height="0.106cm" svg:x="1.64cm" svg:y="26.254cm" svg:viewBox="0 0 107 107" svg:d="M107 54c0 7-2 14-4 20-3 7-7 12-13 17-5 5-10 9-17 12-6 2-13 4-20 4s-14-2-20-4c-7-3-13-7-18-12s-8-10-11-17c-3-6-4-13-4-20 0-8 1-15 4-21 3-7 6-13 11-18s11-8 18-11c6-3 13-4 20-4s14 1 20 4c7 3 12 6 17 11 6 5 10 11 13 18 2 6 4 13 4 21z">
          <text:p/>
        </draw:path>
        <draw:path draw:style-name="gr4" draw:text-style-name="P5" draw:layer="layout" svg:width="0.106cm" svg:height="0.105cm" svg:x="1.64cm" svg:y="26.757cm" svg:viewBox="0 0 107 106" svg:d="M107 53c0 7-2 13-4 21-3 6-7 12-13 17-5 5-10 9-17 11-6 3-13 4-20 4s-14-1-20-4c-7-2-13-6-18-11s-8-11-11-17c-3-8-4-14-4-21s1-14 4-21c3-6 6-12 11-17s11-9 18-11c6-3 13-4 20-4s14 1 20 4c7 2 12 6 17 11 6 5 10 11 13 17 2 7 4 14 4 21z">
          <text:p/>
        </draw:path>
        <draw:path draw:style-name="gr4" draw:text-style-name="P5" draw:layer="layout" svg:width="0.106cm" svg:height="0.106cm" svg:x="1.64cm" svg:y="27.259cm" svg:viewBox="0 0 107 107" svg:d="M107 53c0 7-2 14-4 21-3 6-7 12-13 17-5 6-10 9-17 12-6 3-13 4-20 4s-14-1-20-4c-7-3-13-6-18-12-5-5-8-11-11-17-3-7-4-14-4-21s1-14 4-20 6-12 11-17 11-9 18-12c6-2 13-4 20-4s14 2 20 4c7 3 12 7 17 12 6 5 10 11 13 17 2 6 4 13 4 20z">
          <text:p/>
        </draw:path>
        <draw:path draw:style-name="gr4" draw:text-style-name="P5" draw:layer="layout" svg:width="0.106cm" svg:height="0.106cm" svg:x="1.64cm" svg:y="27.762cm" svg:viewBox="0 0 107 107" svg:d="M107 54c0 7-2 14-4 20-3 7-7 12-13 17-5 5-10 9-17 12-6 3-13 4-20 4s-14-1-20-4c-7-3-13-7-18-12s-8-10-11-17c-3-6-4-13-4-20s1-14 4-20c3-7 6-12 11-17s11-10 18-13c6-3 13-4 20-4s14 1 20 4c7 3 12 8 17 13 6 5 10 10 13 17 2 6 4 13 4 20z">
          <text:p/>
        </draw:path>
        <draw:frame draw:style-name="gr5" draw:text-style-name="P6" draw:layer="layout" svg:width="3.947cm" svg:height="0.53cm" svg:x="1.949cm" svg:y="27.499cm">
          <draw:text-box>
            <text:p text:style-name="P2"><text:span text:style-name="T3">Software </text:span><text:span text:style-name="T3">Engineeri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4" draw:text-style-name="P5" draw:layer="layout" svg:width="17.806cm" svg:height="0.053cm" svg:x="1.587cm" svg:y="2.09cm" svg:viewBox="0 0 17807 54" draw:points="0,0 17807,0 17807,54 0,54">
          <text:p/>
        </draw:polygon>
        <draw:frame draw:style-name="gr7" draw:text-style-name="P8" draw:layer="layout" svg:width="3.202cm" svg:height="0.577cm" svg:x="1.6cm" svg:y="1.479cm">
          <draw:text-box>
            <text:p text:style-name="P2"><text:span text:style-name="T5">Technical </text:span><text:span text:style-name="T5">Skills</text:span></text:p>
          </draw:text-box>
        </draw:frame>
        <draw:frame draw:style-name="gr5" draw:text-style-name="P6" draw:layer="layout" svg:width="2.707cm" svg:height="0.53cm" svg:x="1.6cm" svg:y="2.337cm">
          <draw:text-box>
            <text:p text:style-name="P2"><text:span text:style-name="T6">Programmi</text:span><text:span text:style-name="T6">ng</text:span></text:p>
          </draw:text-box>
        </draw:frame>
        <draw:frame draw:style-name="gr6" draw:text-style-name="P7" draw:layer="layout" svg:width="0.025cm" svg:height="0.048cm" svg:x="1.949cm" svg:y="3.226cm">
          <draw:text-box>
            <text:p text:style-name="P2"><text:span text:style-name="T8">•</text:span></text:p>
          </draw:text-box>
        </draw:frame>
        <draw:frame draw:style-name="gr5" draw:text-style-name="P6" draw:layer="layout" svg:width="3.558cm" svg:height="0.53cm" svg:x="1.949cm" svg:y="2.84cm">
          <draw:text-box>
            <text:p text:style-name="P2"><text:span text:style-name="T3">JavaScript </text:span><text:span text:style-name="T3">(Primary)</text:span></text:p>
          </draw:text-box>
        </draw:frame>
        <draw:frame draw:style-name="gr6" draw:text-style-name="P7" draw:layer="layout" svg:width="0.025cm" svg:height="0.048cm" svg:x="1.949cm" svg:y="3.729cm">
          <draw:text-box>
            <text:p text:style-name="P2"><text:span text:style-name="T8">•</text:span></text:p>
          </draw:text-box>
        </draw:frame>
        <draw:frame draw:style-name="gr5" draw:text-style-name="P6" draw:layer="layout" svg:width="1.293cm" svg:height="0.53cm" svg:x="1.949cm" svg:y="3.342cm">
          <draw:text-box>
            <text:p text:style-name="P2"><text:span text:style-name="T3">Python</text:span></text:p>
          </draw:text-box>
        </draw:frame>
        <draw:frame draw:style-name="gr6" draw:text-style-name="P7" draw:layer="layout" svg:width="0.025cm" svg:height="0.048cm" svg:x="1.949cm" svg:y="4.232cm">
          <draw:text-box>
            <text:p text:style-name="P2"><text:span text:style-name="T8">•</text:span></text:p>
          </draw:text-box>
        </draw:frame>
        <draw:frame draw:style-name="gr5" draw:text-style-name="P6" draw:layer="layout" svg:width="0.76cm" svg:height="0.53cm" svg:x="1.949cm" svg:y="3.845cm">
          <draw:text-box>
            <text:p text:style-name="P2"><text:span text:style-name="T3">PHP</text:span></text:p>
          </draw:text-box>
        </draw:frame>
        <draw:frame draw:style-name="gr6" draw:text-style-name="P7" draw:layer="layout" svg:width="0.025cm" svg:height="0.048cm" svg:x="1.949cm" svg:y="4.734cm">
          <draw:text-box>
            <text:p text:style-name="P2"><text:span text:style-name="T8">•</text:span></text:p>
          </draw:text-box>
        </draw:frame>
        <draw:frame draw:style-name="gr5" draw:text-style-name="P6" draw:layer="layout" svg:width="0.722cm" svg:height="0.53cm" svg:x="1.949cm" svg:y="4.348cm">
          <draw:text-box>
            <text:p text:style-name="P2"><text:span text:style-name="T3">SQL</text:span></text:p>
          </draw:text-box>
        </draw:frame>
        <draw:frame draw:style-name="gr5" draw:text-style-name="P6" draw:layer="layout" svg:width="1.67cm" svg:height="0.53cm" svg:x="1.6cm" svg:y="5.274cm">
          <draw:text-box>
            <text:p text:style-name="P2"><text:span text:style-name="T6">Backend</text:span></text:p>
          </draw:text-box>
        </draw:frame>
        <draw:frame draw:style-name="gr6" draw:text-style-name="P7" draw:layer="layout" svg:width="0.025cm" svg:height="0.048cm" svg:x="1.949cm" svg:y="6.163cm">
          <draw:text-box>
            <text:p text:style-name="P2"><text:span text:style-name="T8">•</text:span></text:p>
          </draw:text-box>
        </draw:frame>
        <draw:frame draw:style-name="gr5" draw:text-style-name="P6" draw:layer="layout" svg:width="1.382cm" svg:height="0.53cm" svg:x="1.949cm" svg:y="5.777cm">
          <draw:text-box>
            <text:p text:style-name="P2"><text:span text:style-name="T3">Node.js</text:span></text:p>
          </draw:text-box>
        </draw:frame>
        <draw:frame draw:style-name="gr6" draw:text-style-name="P7" draw:layer="layout" svg:width="0.025cm" svg:height="0.048cm" svg:x="1.949cm" svg:y="6.66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805cm" svg:height="0.53cm" svg:x="1.949cm" svg:y="6.279cm">
          <draw:text-box>
            <text:p text:style-name="P2"><text:span text:style-name="T3">Express.js</text:span></text:p>
          </draw:text-box>
        </draw:frame>
        <draw:frame draw:style-name="gr6" draw:text-style-name="P7" draw:layer="layout" svg:width="0.025cm" svg:height="0.048cm" svg:x="1.949cm" svg:y="7.168cm">
          <draw:text-box>
            <text:p text:style-name="P2"><text:span text:style-name="T8">•</text:span></text:p>
          </draw:text-box>
        </draw:frame>
        <draw:frame draw:style-name="gr5" draw:text-style-name="P6" draw:layer="layout" svg:width="1.793cm" svg:height="0.53cm" svg:x="1.949cm" svg:y="6.782cm">
          <draw:text-box>
            <text:p text:style-name="P2"><text:span text:style-name="T3">REST APIs</text:span></text:p>
          </draw:text-box>
        </draw:frame>
        <draw:frame draw:style-name="gr6" draw:text-style-name="P7" draw:layer="layout" svg:width="0.025cm" svg:height="0.048cm" svg:x="1.949cm" svg:y="7.671cm">
          <draw:text-box>
            <text:p text:style-name="P2"><text:span text:style-name="T8">•</text:span></text:p>
          </draw:text-box>
        </draw:frame>
        <draw:frame draw:style-name="gr5" draw:text-style-name="P6" draw:layer="layout" svg:width="2.267cm" svg:height="0.53cm" svg:x="1.949cm" svg:y="7.285cm">
          <draw:text-box>
            <text:p text:style-name="P2"><text:span text:style-name="T3">Prisma ORM</text:span></text:p>
          </draw:text-box>
        </draw:frame>
        <draw:frame draw:style-name="gr5" draw:text-style-name="P6" draw:layer="layout" svg:width="1.111cm" svg:height="0.53cm" svg:x="1.6cm" svg:y="8.237cm">
          <draw:text-box>
            <text:p text:style-name="P2"><text:span text:style-name="T6">Cloud</text:span></text:p>
          </draw:text-box>
        </draw:frame>
        <draw:frame draw:style-name="gr6" draw:text-style-name="P7" draw:layer="layout" svg:width="0.025cm" svg:height="0.048cm" svg:x="1.949cm" svg:y="9.126cm">
          <draw:text-box>
            <text:p text:style-name="P2"><text:span text:style-name="T8">•</text:span></text:p>
          </draw:text-box>
        </draw:frame>
        <draw:frame draw:style-name="gr5" draw:text-style-name="P6" draw:layer="layout" svg:width="4.168cm" svg:height="0.53cm" svg:x="1.949cm" svg:y="8.74cm">
          <draw:text-box>
            <text:p text:style-name="P2"><text:span text:style-name="T3">Google </text:span><text:span text:style-name="T3">Cloud </text:span><text:span text:style-name="T3">Platform</text:span></text:p>
          </draw:text-box>
        </draw:frame>
        <draw:frame draw:style-name="gr6" draw:text-style-name="P7" draw:layer="layout" svg:width="0.025cm" svg:height="0.048cm" svg:x="1.949cm" svg:y="9.629cm">
          <draw:text-box>
            <text:p text:style-name="P2"><text:span text:style-name="T8">•</text:span></text:p>
          </draw:text-box>
        </draw:frame>
        <draw:frame draw:style-name="gr5" draw:text-style-name="P6" draw:layer="layout" svg:width="4.003cm" svg:height="0.53cm" svg:x="1.949cm" svg:y="9.243cm">
          <draw:text-box>
            <text:p text:style-name="P2"><text:span text:style-name="T3">Amazon </text:span><text:span text:style-name="T3">Web </text:span><text:span text:style-name="T3">Services</text:span></text:p>
          </draw:text-box>
        </draw:frame>
        <draw:frame draw:style-name="gr5" draw:text-style-name="P6" draw:layer="layout" svg:width="3.693cm" svg:height="0.53cm" svg:x="1.6cm" svg:y="10.169cm">
          <draw:text-box>
            <text:p text:style-name="P2"><text:span text:style-name="T6">Operating </text:span><text:span text:style-name="T6">Systems</text:span></text:p>
          </draw:text-box>
        </draw:frame>
        <draw:frame draw:style-name="gr6" draw:text-style-name="P7" draw:layer="layout" svg:width="0.025cm" svg:height="0.048cm" svg:x="1.949cm" svg:y="11.058cm">
          <draw:text-box>
            <text:p text:style-name="P2"><text:span text:style-name="T8">•</text:span></text:p>
          </draw:text-box>
        </draw:frame>
        <draw:frame draw:style-name="gr5" draw:text-style-name="P6" draw:layer="layout" svg:width="2.716cm" svg:height="0.53cm" svg:x="1.949cm" svg:y="10.671cm">
          <draw:text-box>
            <text:p text:style-name="P2"><text:span text:style-name="T3">Linux </text:span><text:span text:style-name="T3">(Ubuntu)</text:span></text:p>
          </draw:text-box>
        </draw:frame>
        <draw:frame draw:style-name="gr6" draw:text-style-name="P7" draw:layer="layout" svg:width="0.025cm" svg:height="0.048cm" svg:x="1.949cm" svg:y="11.5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67cm" svg:height="0.53cm" svg:x="1.949cm" svg:y="11.174cm">
          <draw:text-box>
            <text:p text:style-name="P2"><text:span text:style-name="T3">Windows</text:span></text:p>
          </draw:text-box>
        </draw:frame>
        <draw:frame draw:style-name="gr5" draw:text-style-name="P6" draw:layer="layout" svg:width="1.788cm" svg:height="0.53cm" svg:x="10.888cm" svg:y="2.337cm">
          <draw:text-box>
            <text:p text:style-name="P2"><text:span text:style-name="T6">Frontend</text:span></text:p>
          </draw:text-box>
        </draw:frame>
        <draw:frame draw:style-name="gr6" draw:text-style-name="P7" draw:layer="layout" svg:width="0.025cm" svg:height="0.048cm" svg:x="11.237cm" svg:y="3.22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285cm" svg:height="0.53cm" svg:x="11.237cm" svg:y="2.84cm">
          <draw:text-box>
            <text:p text:style-name="P2"><text:span text:style-name="T3">HTML5</text:span></text:p>
          </draw:text-box>
        </draw:frame>
        <draw:frame draw:style-name="gr6" draw:text-style-name="P7" draw:layer="layout" svg:width="0.025cm" svg:height="0.048cm" svg:x="11.237cm" svg:y="3.729cm">
          <draw:text-box>
            <text:p text:style-name="P2"><text:span text:style-name="T8">•</text:span></text:p>
          </draw:text-box>
        </draw:frame>
        <draw:frame draw:style-name="gr5" draw:text-style-name="P6" draw:layer="layout" svg:width="0.895cm" svg:height="0.53cm" svg:x="11.237cm" svg:y="3.342cm">
          <draw:text-box>
            <text:p text:style-name="P2"><text:span text:style-name="T3">CSS3</text:span></text:p>
          </draw:text-box>
        </draw:frame>
        <draw:frame draw:style-name="gr6" draw:text-style-name="P7" draw:layer="layout" svg:width="0.025cm" svg:height="0.048cm" svg:x="11.237cm" svg:y="4.232cm">
          <draw:text-box>
            <text:p text:style-name="P2"><text:span text:style-name="T8">•</text:span></text:p>
          </draw:text-box>
        </draw:frame>
        <draw:frame draw:style-name="gr5" draw:text-style-name="P6" draw:layer="layout" svg:width="1.01cm" svg:height="0.53cm" svg:x="11.237cm" svg:y="3.845cm">
          <draw:text-box>
            <text:p text:style-name="P2"><text:span text:style-name="T3">React</text:span></text:p>
          </draw:text-box>
        </draw:frame>
        <draw:frame draw:style-name="gr6" draw:text-style-name="P7" draw:layer="layout" svg:width="0.025cm" svg:height="0.048cm" svg:x="11.237cm" svg:y="4.734cm">
          <draw:text-box>
            <text:p text:style-name="P2"><text:span text:style-name="T8">•</text:span></text:p>
          </draw:text-box>
        </draw:frame>
        <draw:frame draw:style-name="gr5" draw:text-style-name="P6" draw:layer="layout" svg:width="0.696cm" svg:height="0.53cm" svg:x="11.237cm" svg:y="4.348cm">
          <draw:text-box>
            <text:p text:style-name="P2"><text:span text:style-name="T3">Vite</text:span></text:p>
          </draw:text-box>
        </draw:frame>
        <draw:frame draw:style-name="gr5" draw:text-style-name="P6" draw:layer="layout" svg:width="2.026cm" svg:height="0.53cm" svg:x="10.888cm" svg:y="5.274cm">
          <draw:text-box>
            <text:p text:style-name="P2"><text:span text:style-name="T6">Databases</text:span></text:p>
          </draw:text-box>
        </draw:frame>
        <draw:frame draw:style-name="gr6" draw:text-style-name="P7" draw:layer="layout" svg:width="0.025cm" svg:height="0.048cm" svg:x="11.237cm" svg:y="6.163cm">
          <draw:text-box>
            <text:p text:style-name="P2"><text:span text:style-name="T8">•</text:span></text:p>
          </draw:text-box>
        </draw:frame>
        <draw:frame draw:style-name="gr5" draw:text-style-name="P6" draw:layer="layout" svg:width="2.14cm" svg:height="0.53cm" svg:x="11.237cm" svg:y="5.777cm">
          <draw:text-box>
            <text:p text:style-name="P2"><text:span text:style-name="T3">PostgreSQL</text:span></text:p>
          </draw:text-box>
        </draw:frame>
        <draw:frame draw:style-name="gr6" draw:text-style-name="P7" draw:layer="layout" svg:width="0.025cm" svg:height="0.048cm" svg:x="11.237cm" svg:y="6.66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844cm" svg:height="0.53cm" svg:x="11.237cm" svg:y="6.279cm">
          <draw:text-box>
            <text:p text:style-name="P2"><text:span text:style-name="T3">MongoDB</text:span></text:p>
          </draw:text-box>
        </draw:frame>
        <draw:frame draw:style-name="gr6" draw:text-style-name="P7" draw:layer="layout" svg:width="0.025cm" svg:height="0.048cm" svg:x="11.237cm" svg:y="7.168cm">
          <draw:text-box>
            <text:p text:style-name="P2"><text:span text:style-name="T8">•</text:span></text:p>
          </draw:text-box>
        </draw:frame>
        <draw:frame draw:style-name="gr5" draw:text-style-name="P6" draw:layer="layout" svg:width="1.183cm" svg:height="0.53cm" svg:x="11.237cm" svg:y="6.782cm">
          <draw:text-box>
            <text:p text:style-name="P2"><text:span text:style-name="T3">SQLite</text:span></text:p>
          </draw:text-box>
        </draw:frame>
        <draw:frame draw:style-name="gr5" draw:text-style-name="P6" draw:layer="layout" svg:width="2.33cm" svg:height="0.53cm" svg:x="10.888cm" svg:y="7.735cm">
          <draw:text-box>
            <text:p text:style-name="P2"><text:span text:style-name="T6">Networkin</text:span><text:span text:style-name="T6">g</text:span></text:p>
          </draw:text-box>
        </draw:frame>
        <draw:frame draw:style-name="gr6" draw:text-style-name="P7" draw:layer="layout" svg:width="0.025cm" svg:height="0.048cm" svg:x="11.237cm" svg:y="8.624cm">
          <draw:text-box>
            <text:p text:style-name="P2"><text:span text:style-name="T8">•</text:span></text:p>
          </draw:text-box>
        </draw:frame>
        <draw:frame draw:style-name="gr5" draw:text-style-name="P6" draw:layer="layout" svg:width="3.202cm" svg:height="0.53cm" svg:x="11.237cm" svg:y="8.237cm">
          <draw:text-box>
            <text:p text:style-name="P2"><text:span text:style-name="T3">Cisco </text:span><text:span text:style-name="T3">Networking</text:span></text:p>
          </draw:text-box>
        </draw:frame>
        <draw:frame draw:style-name="gr6" draw:text-style-name="P7" draw:layer="layout" svg:width="0.025cm" svg:height="0.048cm" svg:x="11.237cm" svg:y="9.12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213cm" svg:height="0.53cm" svg:x="11.237cm" svg:y="8.74cm">
          <draw:text-box>
            <text:p text:style-name="P2"><text:span text:style-name="T3">TCP/IP</text:span></text:p>
          </draw:text-box>
        </draw:frame>
        <draw:frame draw:style-name="gr6" draw:text-style-name="P7" draw:layer="layout" svg:width="0.025cm" svg:height="0.048cm" svg:x="11.237cm" svg:y="9.629cm">
          <draw:text-box>
            <text:p text:style-name="P2"><text:span text:style-name="T8">•</text:span></text:p>
          </draw:text-box>
        </draw:frame>
        <draw:frame draw:style-name="gr5" draw:text-style-name="P6" draw:layer="layout" svg:width="1.801cm" svg:height="0.53cm" svg:x="11.237cm" svg:y="9.243cm">
          <draw:text-box>
            <text:p text:style-name="P2"><text:span text:style-name="T3">LAN/WAN</text:span></text:p>
          </draw:text-box>
        </draw:frame>
        <draw:frame draw:style-name="gr6" draw:text-style-name="P7" draw:layer="layout" svg:width="0.025cm" svg:height="0.048cm" svg:x="11.237cm" svg:y="10.132cm">
          <draw:text-box>
            <text:p text:style-name="P2"><text:span text:style-name="T8">•</text:span></text:p>
          </draw:text-box>
        </draw:frame>
        <draw:frame draw:style-name="gr5" draw:text-style-name="P6" draw:layer="layout" svg:width="3.698cm" svg:height="0.53cm" svg:x="11.237cm" svg:y="9.745cm">
          <draw:text-box>
            <text:p text:style-name="P2"><text:span text:style-name="T3">Routing &amp; </text:span><text:span text:style-name="T3">Switching</text:span></text:p>
          </draw:text-box>
        </draw:frame>
        <draw:frame draw:style-name="gr6" draw:text-style-name="P7" draw:layer="layout" svg:width="0.025cm" svg:height="0.048cm" svg:x="11.237cm" svg:y="10.634cm">
          <draw:text-box>
            <text:p text:style-name="P2"><text:span text:style-name="T8">•</text:span></text:p>
          </draw:text-box>
        </draw:frame>
        <draw:frame draw:style-name="gr5" draw:text-style-name="P6" draw:layer="layout" svg:width="3.901cm" svg:height="0.53cm" svg:x="11.237cm" svg:y="10.248cm">
          <draw:text-box>
            <text:p text:style-name="P2"><text:span text:style-name="T3">Broadband </text:span><text:span text:style-name="T3">Networks</text:span></text:p>
          </draw:text-box>
        </draw:frame>
        <draw:frame draw:style-name="gr5" draw:text-style-name="P6" draw:layer="layout" svg:width="1.018cm" svg:height="0.53cm" svg:x="10.888cm" svg:y="11.174cm">
          <draw:text-box>
            <text:p text:style-name="P2"><text:span text:style-name="T6">Tools</text:span></text:p>
          </draw:text-box>
        </draw:frame>
        <draw:frame draw:style-name="gr6" draw:text-style-name="P7" draw:layer="layout" svg:width="0.025cm" svg:height="0.048cm" svg:x="11.237cm" svg:y="12.063cm">
          <draw:text-box>
            <text:p text:style-name="P2"><text:span text:style-name="T8">•</text:span></text:p>
          </draw:text-box>
        </draw:frame>
        <draw:frame draw:style-name="gr5" draw:text-style-name="P6" draw:layer="layout" svg:width="0.523cm" svg:height="0.53cm" svg:x="11.237cm" svg:y="11.677cm">
          <draw:text-box>
            <text:p text:style-name="P2"><text:span text:style-name="T3">Git</text:span></text:p>
          </draw:text-box>
        </draw:frame>
        <draw:frame draw:style-name="gr6" draw:text-style-name="P7" draw:layer="layout" svg:width="0.025cm" svg:height="0.048cm" svg:x="11.237cm" svg:y="12.566cm">
          <draw:text-box>
            <text:p text:style-name="P2"><text:span text:style-name="T8">•</text:span></text:p>
          </draw:text-box>
        </draw:frame>
        <draw:frame draw:style-name="gr5" draw:text-style-name="P6" draw:layer="layout" svg:width="1.293cm" svg:height="0.53cm" svg:x="11.237cm" svg:y="12.18cm">
          <draw:text-box>
            <text:p text:style-name="P2"><text:span text:style-name="T3">GitHub</text:span></text:p>
          </draw:text-box>
        </draw:frame>
        <draw:frame draw:style-name="gr6" draw:text-style-name="P7" draw:layer="layout" svg:width="0.025cm" svg:height="0.048cm" svg:x="11.237cm" svg:y="13.069cm">
          <draw:text-box>
            <text:p text:style-name="P2"><text:span text:style-name="T8">•</text:span></text:p>
          </draw:text-box>
        </draw:frame>
        <draw:frame draw:style-name="gr5" draw:text-style-name="P6" draw:layer="layout" svg:width="1.293cm" svg:height="0.53cm" svg:x="11.237cm" svg:y="12.682cm">
          <draw:text-box>
            <text:p text:style-name="P2"><text:span text:style-name="T3">Docker</text:span></text:p>
          </draw:text-box>
        </draw:frame>
        <draw:frame draw:style-name="gr6" draw:text-style-name="P7" draw:layer="layout" svg:width="0.025cm" svg:height="0.048cm" svg:x="11.237cm" svg:y="13.571cm">
          <draw:text-box>
            <text:p text:style-name="P2"><text:span text:style-name="T8">•</text:span></text:p>
          </draw:text-box>
        </draw:frame>
        <draw:frame draw:style-name="gr5" draw:text-style-name="P6" draw:layer="layout" svg:width="1.467cm" svg:height="0.53cm" svg:x="11.237cm" svg:y="13.185cm">
          <draw:text-box>
            <text:p text:style-name="P2"><text:span text:style-name="T3">Arduino</text:span></text:p>
          </draw:text-box>
        </draw:frame>
        <draw:frame draw:style-name="gr6" draw:text-style-name="P7" draw:layer="layout" svg:width="0.025cm" svg:height="0.048cm" svg:x="11.237cm" svg:y="14.074cm">
          <draw:text-box>
            <text:p text:style-name="P2"><text:span text:style-name="T8">•</text:span></text:p>
          </draw:text-box>
        </draw:frame>
        <draw:frame draw:style-name="gr5" draw:text-style-name="P6" draw:layer="layout" svg:width="1.111cm" svg:height="0.53cm" svg:x="11.237cm" svg:y="13.688cm">
          <draw:text-box>
            <text:p text:style-name="P2"><text:span text:style-name="T3">ESP32</text:span></text:p>
          </draw:text-box>
        </draw:frame>
        <draw:frame draw:style-name="gr6" draw:text-style-name="P7" draw:layer="layout" svg:width="0.025cm" svg:height="0.048cm" svg:x="11.237cm" svg:y="14.577cm">
          <draw:text-box>
            <text:p text:style-name="P2"><text:span text:style-name="T8">•</text:span></text:p>
          </draw:text-box>
        </draw:frame>
        <draw:polygon draw:style-name="gr4" draw:text-style-name="P5" draw:layer="layout" svg:width="17.806cm" svg:height="0.053cm" svg:x="1.587cm" svg:y="15.848cm" svg:viewBox="0 0 17807 54" draw:points="0,0 17807,0 17807,54 0,54">
          <text:p/>
        </draw:polygon>
        <draw:frame draw:style-name="gr5" draw:text-style-name="P6" draw:layer="layout" svg:width="2.305cm" svg:height="0.53cm" svg:x="11.237cm" svg:y="14.19cm">
          <draw:text-box>
            <text:p text:style-name="P2"><text:span text:style-name="T3">Raspberry Pi</text:span></text:p>
          </draw:text-box>
        </draw:frame>
        <draw:frame draw:style-name="gr7" draw:text-style-name="P8" draw:layer="layout" svg:width="1.712cm" svg:height="0.577cm" svg:x="1.6cm" svg:y="15.237cm">
          <draw:text-box>
            <text:p text:style-name="P2"><text:span text:style-name="T5">Projects</text:span></text:p>
          </draw:text-box>
        </draw:frame>
        <draw:frame draw:style-name="gr5" draw:text-style-name="P6" draw:layer="layout" svg:width="11.245cm" svg:height="0.53cm" svg:x="1.6cm" svg:y="16.095cm">
          <draw:text-box>
            <text:p text:style-name="P2"><text:span text:style-name="T6">Installer </text:span><text:span text:style-name="T6">Manageme</text:span><text:span text:style-name="T6">nt System, </text:span><text:span text:style-name="T7">Node.js • </text:span><text:span text:style-name="T7">PostgreSQL • </text:span><text:span text:style-name="T7">Prisma</text:span></text:p>
          </draw:text-box>
        </draw:frame>
        <draw:frame draw:style-name="gr5" draw:text-style-name="P6" draw:layer="layout" svg:width="20.132cm" svg:height="0.53cm" svg:x="1.6cm" svg:y="16.598cm">
          <draw:text-box>
            <text:p text:style-name="P2"><text:span text:style-name="T3">Backend </text:span><text:span text:style-name="T3">system </text:span><text:span text:style-name="T3">developed </text:span><text:span text:style-name="T3">for </text:span><text:span text:style-name="T3">managing </text:span><text:span text:style-name="T3">field </text:span><text:span text:style-name="T3">installers, </text:span><text:span text:style-name="T3">automating </text:span><text:span text:style-name="T3">contract </text:span><text:span text:style-name="T3">processing, </text:span><text:span text:style-name="T3">and </text:span><text:span text:style-name="T3">providing </text:span><text:span text:style-name="T3">REST </text:span></text:p>
          </draw:text-box>
        </draw:frame>
        <draw:frame draw:style-name="gr5" draw:text-style-name="P6" draw:layer="layout" svg:width="4.515cm" svg:height="0.53cm" svg:x="1.6cm" svg:y="17.101cm">
          <draw:text-box>
            <text:p text:style-name="P2"><text:span text:style-name="T3">APIs for </text:span><text:span text:style-name="T3">field </text:span><text:span text:style-name="T3">operations.</text:span></text:p>
          </draw:text-box>
        </draw:frame>
        <draw:frame draw:style-name="gr5" draw:text-style-name="P6" draw:layer="layout" svg:width="14.713cm" svg:height="0.53cm" svg:x="1.6cm" svg:y="17.921cm">
          <draw:text-box>
            <text:p text:style-name="P2"><text:span text:style-name="T6">Smart </text:span><text:span text:style-name="T6">Farming </text:span><text:span text:style-name="T6">System, </text:span><text:span text:style-name="T7">React Native </text:span><text:span text:style-name="T7">• Node.js • </text:span><text:span text:style-name="T7">MongoDB • </text:span><text:span text:style-name="T7">Arduino • </text:span><text:span text:style-name="T7">Raspberry Pi</text:span></text:p>
          </draw:text-box>
        </draw:frame>
        <draw:frame draw:style-name="gr5" draw:text-style-name="P6" draw:layer="layout" svg:width="13.743cm" svg:height="0.53cm" svg:x="1.6cm" svg:y="18.424cm">
          <draw:text-box>
            <text:p text:style-name="P2"><text:span text:style-name="T3">IoT platform </text:span><text:span text:style-name="T3">for </text:span><text:span text:style-name="T3">environmen</text:span><text:span text:style-name="T3">tal </text:span><text:span text:style-name="T3">monitoring </text:span><text:span text:style-name="T3">and remote </text:span><text:span text:style-name="T3">farm </text:span><text:span text:style-name="T3">manageme</text:span><text:span text:style-name="T3">nt.</text:span></text:p>
          </draw:text-box>
        </draw:frame>
        <draw:frame draw:style-name="gr5" draw:text-style-name="P6" draw:layer="layout" svg:width="9.671cm" svg:height="0.53cm" svg:x="1.6cm" svg:y="19.244cm">
          <draw:text-box>
            <text:p text:style-name="P2"><text:span text:style-name="T6">Pakala </text:span><text:span text:style-name="T6">Local </text:span><text:span text:style-name="T6">Trading </text:span><text:span text:style-name="T6">Platform, </text:span><text:span text:style-name="T7">Node.js • </text:span><text:span text:style-name="T7">PostgreSQL</text:span></text:p>
          </draw:text-box>
        </draw:frame>
        <draw:frame draw:style-name="gr5" draw:text-style-name="P6" draw:layer="layout" svg:width="10.585cm" svg:height="0.53cm" svg:x="1.6cm" svg:y="19.747cm">
          <draw:text-box>
            <text:p text:style-name="P2"><text:span text:style-name="T3">Marketplace </text:span><text:span text:style-name="T3">platform </text:span><text:span text:style-name="T3">supporting </text:span><text:span text:style-name="T3">local buying </text:span><text:span text:style-name="T3">and selling.</text:span></text:p>
          </draw:text-box>
        </draw:frame>
        <draw:frame draw:style-name="gr5" draw:text-style-name="P6" draw:layer="layout" svg:width="8.786cm" svg:height="0.53cm" svg:x="1.6cm" svg:y="20.567cm">
          <draw:text-box>
            <text:p text:style-name="P2"><text:span text:style-name="T6">AI Story </text:span><text:span text:style-name="T6">Journaling </text:span><text:span text:style-name="T6">Application</text:span><text:span text:style-name="T6">, </text:span><text:span text:style-name="T7">React • </text:span><text:span text:style-name="T7">Node.js</text:span></text:p>
          </draw:text-box>
        </draw:frame>
        <draw:polygon draw:style-name="gr4" draw:text-style-name="P5" draw:layer="layout" svg:width="17.806cm" svg:height="0.053cm" svg:x="1.587cm" svg:y="22.727cm" svg:viewBox="0 0 17807 54" draw:points="0,0 17807,0 17807,54 0,54">
          <text:p/>
        </draw:polygon>
        <draw:frame draw:style-name="gr5" draw:text-style-name="P6" draw:layer="layout" svg:width="15.716cm" svg:height="0.53cm" svg:x="1.6cm" svg:y="21.07cm">
          <draw:text-box>
            <text:p text:style-name="P2"><text:span text:style-name="T3">AI-powered </text:span><text:span text:style-name="T3">journaling </text:span><text:span text:style-name="T3">platform </text:span><text:span text:style-name="T3">that helps </text:span><text:span text:style-name="T3">users </text:span><text:span text:style-name="T3">organize </text:span><text:span text:style-name="T3">and enrich </text:span><text:span text:style-name="T3">personal </text:span><text:span text:style-name="T3">stories.</text:span></text:p>
          </draw:text-box>
        </draw:frame>
        <draw:path draw:style-name="gr4" draw:text-style-name="P5" draw:layer="layout" svg:width="0.106cm" svg:height="0.106cm" svg:x="1.64cm" svg:y="23.23cm" svg:viewBox="0 0 107 107" svg:d="M107 54c0 7-2 14-4 20-3 7-7 12-13 17-5 5-10 9-17 12-6 2-13 4-20 4s-14-2-20-4c-7-3-13-7-18-12s-8-10-11-17c-3-6-4-13-4-20s1-14 4-20c3-8 6-14 11-19s11-8 18-11c6-3 13-4 20-4s14 1 20 4c7 3 12 6 17 11 6 5 10 11 13 19 2 6 4 13 4 20z">
          <text:p/>
        </draw:path>
        <draw:frame draw:style-name="gr7" draw:text-style-name="P8" draw:layer="layout" svg:width="2.855cm" svg:height="0.577cm" svg:x="1.6cm" svg:y="22.116cm">
          <draw:text-box>
            <text:p text:style-name="P2"><text:span text:style-name="T5">Certificati</text:span><text:span text:style-name="T5">ons</text:span></text:p>
          </draw:text-box>
        </draw:frame>
        <draw:frame draw:style-name="gr5" draw:text-style-name="P6" draw:layer="layout" svg:width="4.388cm" svg:height="0.53cm" svg:x="1.949cm" svg:y="22.948cm">
          <draw:text-box>
            <text:p text:style-name="P2"><text:span text:style-name="T3">Cisco </text:span><text:span text:style-name="T3">Certified </text:span><text:span text:style-name="T3">Network </text:span></text:p>
          </draw:text-box>
        </draw:frame>
        <draw:path draw:style-name="gr4" draw:text-style-name="P5" draw:layer="layout" svg:width="0.106cm" svg:height="0.106cm" svg:x="1.64cm" svg:y="24.5cm" svg:viewBox="0 0 107 107" svg:d="M107 54c0 7-2 14-4 20-3 7-7 12-13 17-5 5-10 9-17 12-6 2-13 4-20 4s-14-2-20-4c-7-3-13-7-18-12s-8-10-11-17c-3-6-4-13-4-20s1-14 4-20c3-7 6-13 11-19 5-5 11-8 18-11 6-3 13-4 20-4s14 1 20 4c7 3 12 6 17 11 6 6 10 12 13 19 2 6 4 13 4 20z">
          <text:p/>
        </draw:path>
        <draw:frame draw:style-name="gr5" draw:text-style-name="P6" draw:layer="layout" svg:width="3.097cm" svg:height="0.53cm" svg:x="1.949cm" svg:y="23.451cm">
          <draw:text-box>
            <text:p text:style-name="P2"><text:span text:style-name="T3">Associate </text:span><text:span text:style-name="T3">(CCNA)</text:span></text:p>
          </draw:text-box>
        </draw:frame>
        <draw:path draw:style-name="gr4" draw:text-style-name="P5" draw:layer="layout" svg:width="0.106cm" svg:height="0.106cm" svg:x="7.831cm" svg:y="23.23cm" svg:viewBox="0 0 107 107" svg:d="M107 54c0 7-1 14-4 20-3 7-8 12-12 17-5 5-11 9-18 12-6 2-13 4-20 4s-14-2-20-4c-7-3-12-7-17-12s-9-10-12-17c-2-6-4-13-4-20s2-14 4-20c3-8 7-14 12-19s10-8 17-11c6-3 13-4 20-4s14 1 20 4c7 3 13 6 18 11 4 5 9 11 12 19 3 6 4 13 4 20z">
          <text:p/>
        </draw:path>
        <draw:frame draw:style-name="gr5" draw:text-style-name="P6" draw:layer="layout" svg:width="3.152cm" svg:height="0.53cm" svg:x="1.949cm" svg:y="24.218cm">
          <draw:text-box>
            <text:p text:style-name="P2"><text:span text:style-name="T3">AWS </text:span><text:span text:style-name="T3">Certification</text:span></text:p>
          </draw:text-box>
        </draw:frame>
        <draw:path draw:style-name="gr4" draw:text-style-name="P5" draw:layer="layout" svg:width="0.106cm" svg:height="0.106cm" svg:x="14.049cm" svg:y="23.23cm" svg:viewBox="0 0 107 107" svg:d="M107 54c0 7-2 14-4 20-3 7-7 12-12 17s-10 9-18 12c-6 2-13 4-20 4s-14-2-20-4c-7-3-13-7-18-12s-8-10-11-17c-3-6-4-13-4-20s1-14 4-20c3-8 6-14 11-19s11-8 18-11c6-3 13-4 20-4s14 1 20 4c8 3 13 6 18 11s9 11 12 19c2 6 4 13 4 20z">
          <text:p/>
        </draw:path>
        <draw:frame draw:style-name="gr5" draw:text-style-name="P6" draw:layer="layout" svg:width="3.317cm" svg:height="0.53cm" svg:x="8.14cm" svg:y="22.948cm">
          <draw:text-box>
            <text:p text:style-name="P2"><text:span text:style-name="T3">Linux </text:span><text:span text:style-name="T3">Certification</text:span></text:p>
          </draw:text-box>
        </draw:frame>
        <draw:polygon draw:style-name="gr4" draw:text-style-name="P5" draw:layer="layout" svg:width="17.806cm" svg:height="0.053cm" svg:x="1.587cm" svg:y="25.876cm" svg:viewBox="0 0 17807 54" draw:points="0,0 17807,0 17807,54 0,54">
          <text:p/>
        </draw:polygon>
        <draw:frame draw:style-name="gr5" draw:text-style-name="P6" draw:layer="layout" svg:width="4.803cm" svg:height="0.53cm" svg:x="14.333cm" svg:y="22.948cm">
          <draw:text-box>
            <text:p text:style-name="P2"><text:span text:style-name="T3">Google </text:span><text:span text:style-name="T3">Cloud </text:span><text:span text:style-name="T3">Certification</text:span></text:p>
          </draw:text-box>
        </draw:frame>
        <draw:frame draw:style-name="gr7" draw:text-style-name="P8" draw:layer="layout" svg:width="7.406cm" svg:height="0.577cm" svg:x="1.6cm" svg:y="25.265cm">
          <draw:text-box>
            <text:p text:style-name="P2"><text:span text:style-name="T5">Leadership </text:span><text:span text:style-name="T5">&amp; </text:span><text:span text:style-name="T5">Volunteer </text:span><text:span text:style-name="T5">Experience</text:span></text:p>
          </draw:text-box>
        </draw:frame>
        <draw:frame draw:style-name="gr5" draw:text-style-name="P6" draw:layer="layout" svg:width="5.395cm" svg:height="0.53cm" svg:x="1.6cm" svg:y="26.123cm">
          <draw:text-box>
            <text:p text:style-name="P2"><text:span text:style-name="T6">UNZA </text:span><text:span text:style-name="T6">Innovation </text:span><text:span text:style-name="T6">Challenge</text:span></text:p>
          </draw:text-box>
        </draw:frame>
        <draw:path draw:style-name="gr4" draw:text-style-name="P5" draw:layer="layout" svg:width="0.106cm" svg:height="0.106cm" svg:x="1.64cm" svg:y="3.129cm" svg:viewBox="0 0 107 107" svg:d="M107 53c0 7-2 14-4 22-3 6-7 12-13 17-5 5-10 8-17 11-6 3-13 4-20 4s-14-1-20-4c-7-3-13-6-18-11s-8-11-11-17c-3-8-4-15-4-22s1-14 4-20 6-12 11-17 11-9 18-12c6-2 13-4 20-4s14 2 20 4c7 3 12 7 17 12 6 5 10 11 13 17 2 6 4 13 4 20z">
          <text:p/>
        </draw:path>
        <draw:path draw:style-name="gr4" draw:text-style-name="P5" draw:layer="layout" svg:width="0.106cm" svg:height="0.106cm" svg:x="1.64cm" svg:y="3.632cm" svg:viewBox="0 0 107 107" svg:d="M107 53c0 7-2 14-4 20-3 7-7 12-13 17-5 5-10 10-17 13-6 3-13 4-20 4s-14-1-20-4c-7-3-13-8-18-13s-8-10-11-17c-3-6-4-13-4-20s1-14 4-20c3-7 6-12 11-17s11-9 18-12c6-3 13-4 20-4s14 1 20 4c7 3 12 7 17 12 6 5 10 10 13 17 2 6 4 13 4 20z">
          <text:p/>
        </draw:path>
        <draw:path draw:style-name="gr4" draw:text-style-name="P5" draw:layer="layout" svg:width="0.106cm" svg:height="0.106cm" svg:x="1.64cm" svg:y="4.135cm" svg:viewBox="0 0 107 107" svg:d="M107 54c0 7-2 13-4 20-3 6-7 12-13 17-5 5-10 9-17 12-6 2-13 4-20 4s-14-2-20-4c-7-3-13-7-18-12s-8-11-11-17c-3-7-4-13-4-20s1-14 4-21c3-6 6-12 11-17 5-6 11-10 18-12 6-3 13-4 20-4s14 1 20 4c7 2 12 6 17 12 6 5 10 11 13 17 2 7 4 14 4 21z">
          <text:p/>
        </draw:path>
        <draw:path draw:style-name="gr4" draw:text-style-name="P5" draw:layer="layout" svg:width="0.106cm" svg:height="0.106cm" svg:x="1.64cm" svg:y="4.637cm" svg:viewBox="0 0 107 107" svg:d="M107 54c0 7-2 14-4 21-3 6-7 12-13 17-5 5-10 9-17 11-6 3-13 4-20 4s-14-1-20-4c-7-2-13-6-18-11s-8-11-11-17c-3-7-4-14-4-21s1-13 4-21c3-6 6-12 11-17s11-9 18-12c6-2 13-4 20-4s14 2 20 4c7 3 12 7 17 12 6 5 10 11 13 17 2 8 4 14 4 21z">
          <text:p/>
        </draw:path>
        <draw:path draw:style-name="gr4" draw:text-style-name="P5" draw:layer="layout" svg:width="0.106cm" svg:height="0.106cm" svg:x="1.64cm" svg:y="6.066cm" svg:viewBox="0 0 107 107" svg:d="M107 53c0 7-2 14-4 20-3 8-7 14-13 19-5 5-10 8-17 11-6 3-13 4-20 4s-14-1-20-4c-7-3-13-6-18-11s-8-11-11-19c-3-6-4-13-4-20s1-14 4-20c3-7 6-12 11-17s11-9 18-12c6-2 13-4 20-4s14 2 20 4c7 3 12 7 17 12 6 5 10 10 13 17 2 6 4 13 4 20z">
          <text:p/>
        </draw:path>
        <draw:path draw:style-name="gr4" draw:text-style-name="P5" draw:layer="layout" svg:width="0.106cm" svg:height="0.106cm" svg:x="1.64cm" svg:y="6.569cm" svg:viewBox="0 0 107 107" svg:d="M107 53c0 7-2 14-4 20-3 7-7 12-13 17-5 5-10 10-17 13-6 2-13 4-20 4s-14-2-20-4c-7-3-13-8-18-13s-8-10-11-17c-3-6-4-13-4-20s1-14 4-20c3-7 6-13 11-18s11-8 18-11c6-3 13-4 20-4s14 1 20 4c7 3 12 6 17 11 6 5 10 11 13 18 2 6 4 13 4 20z">
          <text:p/>
        </draw:path>
        <draw:path draw:style-name="gr4" draw:text-style-name="P5" draw:layer="layout" svg:width="0.106cm" svg:height="0.105cm" svg:x="1.64cm" svg:y="7.072cm" svg:viewBox="0 0 107 106" svg:d="M107 54c0 7-2 13-4 20-3 6-7 12-13 17-5 5-10 9-17 11-6 3-13 4-20 4s-14-1-20-4c-7-2-13-6-18-11s-8-11-11-17c-3-7-4-13-4-20s1-14 4-21c3-6 6-12 11-18 5-5 11-9 18-11 6-3 13-4 20-4s14 1 20 4c7 2 12 6 17 11 6 6 10 12 13 18 2 7 4 14 4 21z">
          <text:p/>
        </draw:path>
        <draw:path draw:style-name="gr4" draw:text-style-name="P5" draw:layer="layout" svg:width="0.106cm" svg:height="0.106cm" svg:x="1.64cm" svg:y="7.574cm" svg:viewBox="0 0 107 107" svg:d="M107 54c0 7-2 14-4 21-3 6-7 12-13 17-5 5-10 8-17 11-6 3-13 4-20 4s-14-1-20-4c-7-3-13-6-18-11s-8-11-11-17c-3-7-4-14-4-21s1-14 4-21c3-6 6-12 11-17s11-9 18-12c6-2 13-4 20-4s14 2 20 4c7 3 12 7 17 12 6 5 10 11 13 17 2 7 4 14 4 21z">
          <text:p/>
        </draw:path>
        <draw:path draw:style-name="gr4" draw:text-style-name="P5" draw:layer="layout" svg:width="0.106cm" svg:height="0.106cm" svg:x="1.64cm" svg:y="9.003cm" svg:viewBox="0 0 107 107" svg:d="M107 53c0 7-2 14-4 20-3 8-7 13-13 18-5 5-10 9-17 12-6 3-13 4-20 4s-14-1-20-4c-7-3-13-7-18-12s-8-10-11-18c-3-6-4-13-4-20s1-14 4-20c3-7 6-12 11-17s11-9 18-12c6-3 13-4 20-4s14 1 20 4c7 3 12 7 17 12 6 5 10 10 13 17 2 6 4 13 4 20z">
          <text:p/>
        </draw:path>
        <draw:path draw:style-name="gr4" draw:text-style-name="P5" draw:layer="layout" svg:width="0.106cm" svg:height="0.106cm" svg:x="1.64cm" svg:y="9.506cm" svg:viewBox="0 0 107 107" svg:d="M107 53c0 7-2 13-4 20-3 6-7 12-13 17-5 5-10 9-17 13-6 2-13 4-20 4s-14-2-20-4c-7-4-13-8-18-13s-8-11-11-17c-3-7-4-13-4-20s1-14 4-21c3-6 6-12 11-17s11-8 18-11c6-3 13-4 20-4s14 1 20 4c7 3 12 6 17 11 6 5 10 11 13 17 2 7 4 14 4 21z">
          <text:p/>
        </draw:path>
        <draw:path draw:style-name="gr4" draw:text-style-name="P5" draw:layer="layout" svg:width="0.106cm" svg:height="0.106cm" svg:x="1.64cm" svg:y="10.961cm" svg:viewBox="0 0 107 107" svg:d="M107 54c0 7-2 14-4 20-3 7-7 12-13 17-5 5-10 9-17 12-6 2-13 4-20 4s-14-2-20-4c-7-3-13-7-18-12s-8-10-11-17c-3-6-4-13-4-20s1-14 4-20c3-7 6-13 11-17 5-6 11-10 18-13 6-3 13-4 20-4s14 1 20 4c7 3 12 7 17 13 6 4 10 10 13 17 2 6 4 13 4 20z">
          <text:p/>
        </draw:path>
        <draw:path draw:style-name="gr4" draw:text-style-name="P5" draw:layer="layout" svg:width="0.106cm" svg:height="0.106cm" svg:x="1.64cm" svg:y="11.464cm" svg:viewBox="0 0 107 107" svg:d="M107 54c0 7-2 13-4 20-3 6-7 12-13 17-5 5-10 9-17 12-6 2-13 4-20 4s-14-2-20-4c-7-3-13-7-18-12s-8-11-11-17c-3-7-4-13-4-20s1-14 4-22c3-6 6-12 11-17s11-9 18-11c6-3 13-4 20-4s14 1 20 4c7 2 12 6 17 11 6 5 10 11 13 17 2 8 4 15 4 22z">
          <text:p/>
        </draw:path>
        <draw:path draw:style-name="gr4" draw:text-style-name="P5" draw:layer="layout" svg:width="0.106cm" svg:height="0.106cm" svg:x="10.927cm" svg:y="3.129cm" svg:viewBox="0 0 107 107" svg:d="M107 53c0 7-2 14-4 22-3 6-7 12-12 17s-11 8-17 11c-7 3-13 4-20 4s-15-1-22-4c-6-3-12-6-17-11s-8-11-11-17c-3-8-4-15-4-22s1-14 4-20 6-12 11-17 11-9 17-12c7-2 15-4 22-4s13 2 20 4c6 3 12 7 17 12s9 11 12 17c2 6 4 13 4 20z">
          <text:p/>
        </draw:path>
        <draw:path draw:style-name="gr4" draw:text-style-name="P5" draw:layer="layout" svg:width="0.106cm" svg:height="0.106cm" svg:x="10.927cm" svg:y="3.632cm" svg:viewBox="0 0 107 107" svg:d="M107 53c0 7-2 14-4 20-3 7-7 12-12 17s-11 10-17 13c-7 3-13 4-20 4s-15-1-22-4c-6-3-12-8-17-13s-8-10-11-17c-3-6-4-13-4-20s1-14 4-20c3-7 6-12 11-17s11-9 17-12c7-3 15-4 22-4s13 1 20 4c6 3 12 7 17 12s9 10 12 17c2 6 4 13 4 20z">
          <text:p/>
        </draw:path>
        <draw:path draw:style-name="gr4" draw:text-style-name="P5" draw:layer="layout" svg:width="0.106cm" svg:height="0.106cm" svg:x="10.927cm" svg:y="4.135cm" svg:viewBox="0 0 107 107" svg:d="M107 54c0 7-2 13-4 20-3 6-7 12-12 17s-11 9-17 12c-7 2-13 4-20 4s-15-2-22-4c-6-3-12-7-17-12s-8-11-11-17c-3-7-4-13-4-20s1-14 4-21c3-6 6-12 11-17 5-6 11-10 17-12 7-3 15-4 22-4s13 1 20 4c6 2 12 6 17 12 5 5 9 11 12 17 2 7 4 14 4 21z">
          <text:p/>
        </draw:path>
        <draw:path draw:style-name="gr4" draw:text-style-name="P5" draw:layer="layout" svg:width="0.106cm" svg:height="0.106cm" svg:x="10.927cm" svg:y="4.637cm" svg:viewBox="0 0 107 107" svg:d="M107 54c0 7-2 14-4 21-3 6-7 12-12 17s-11 9-17 11c-7 3-13 4-20 4s-15-1-22-4c-6-2-12-6-17-11s-8-11-11-17c-3-7-4-14-4-21s1-13 4-21c3-6 6-12 11-17s11-9 17-12c7-2 15-4 22-4s13 2 20 4c6 3 12 7 17 12s9 11 12 17c2 8 4 14 4 21z">
          <text:p/>
        </draw:path>
        <draw:path draw:style-name="gr4" draw:text-style-name="P5" draw:layer="layout" svg:width="0.106cm" svg:height="0.106cm" svg:x="10.927cm" svg:y="6.066cm" svg:viewBox="0 0 107 107" svg:d="M107 53c0 7-2 14-4 20-3 8-7 14-12 19s-11 8-17 11c-7 3-13 4-20 4s-15-1-22-4c-6-3-12-6-17-11s-8-11-11-19c-3-6-4-13-4-20s1-14 4-20c3-7 6-12 11-17s11-9 17-12c7-2 15-4 22-4s13 2 20 4c6 3 12 7 17 12s9 10 12 17c2 6 4 13 4 20z">
          <text:p/>
        </draw:path>
        <draw:path draw:style-name="gr4" draw:text-style-name="P5" draw:layer="layout" svg:width="0.106cm" svg:height="0.106cm" svg:x="10.927cm" svg:y="6.569cm" svg:viewBox="0 0 107 107" svg:d="M107 53c0 7-2 14-4 20-3 7-7 12-12 17s-11 10-17 13c-7 2-13 4-20 4s-15-2-22-4c-6-3-12-8-17-13s-8-10-11-17c-3-6-4-13-4-20s1-14 4-20c3-7 6-13 11-18s11-8 17-11c7-3 15-4 22-4s13 1 20 4c6 3 12 6 17 11s9 11 12 18c2 6 4 13 4 20z">
          <text:p/>
        </draw:path>
        <draw:path draw:style-name="gr4" draw:text-style-name="P5" draw:layer="layout" svg:width="0.106cm" svg:height="0.105cm" svg:x="10.927cm" svg:y="7.072cm" svg:viewBox="0 0 107 106" svg:d="M107 54c0 7-2 13-4 20-3 6-7 12-12 17s-11 9-17 11c-7 3-13 4-20 4s-15-1-22-4c-6-2-12-6-17-11s-8-11-11-17c-3-7-4-13-4-20s1-14 4-21c3-6 6-12 11-18 5-5 11-9 17-11 7-3 15-4 22-4s13 1 20 4c6 2 12 6 17 11 5 6 9 12 12 18 2 7 4 14 4 21z">
          <text:p/>
        </draw:path>
        <draw:path draw:style-name="gr4" draw:text-style-name="P5" draw:layer="layout" svg:width="0.106cm" svg:height="0.106cm" svg:x="10.927cm" svg:y="8.5cm" svg:viewBox="0 0 107 107" svg:d="M107 53c0 8-2 15-4 22-3 6-7 12-12 17s-11 9-17 11c-7 3-13 4-20 4s-15-1-22-4c-6-2-12-6-17-11s-8-11-11-17c-3-7-4-14-4-22 0-7 1-13 4-20 3-6 6-12 11-17s11-9 17-12c7-2 15-4 22-4s13 2 20 4c6 3 12 7 17 12s9 11 12 17c2 7 4 13 4 20z">
          <text:p/>
        </draw:path>
        <draw:path draw:style-name="gr4" draw:text-style-name="P5" draw:layer="layout" svg:width="0.106cm" svg:height="0.106cm" svg:x="10.927cm" svg:y="9.003cm" svg:viewBox="0 0 107 107" svg:d="M107 53c0 7-2 14-4 20-3 8-7 13-12 18s-11 9-17 12c-7 3-13 4-20 4s-15-1-22-4c-6-3-12-7-17-12s-8-10-11-18c-3-6-4-13-4-20s1-14 4-20c3-7 6-12 11-17s11-9 17-12c7-3 15-4 22-4s13 1 20 4c6 3 12 7 17 12s9 10 12 17c2 6 4 13 4 20z">
          <text:p/>
        </draw:path>
        <draw:path draw:style-name="gr4" draw:text-style-name="P5" draw:layer="layout" svg:width="0.106cm" svg:height="0.106cm" svg:x="10.927cm" svg:y="9.506cm" svg:viewBox="0 0 107 107" svg:d="M107 53c0 7-2 13-4 20-3 6-7 12-12 17s-11 9-17 13c-7 2-13 4-20 4s-15-2-22-4c-6-4-12-8-17-13s-8-11-11-17c-3-7-4-13-4-20s1-14 4-21c3-6 6-12 11-17s11-8 17-11c7-3 15-4 22-4s13 1 20 4c6 3 12 6 17 11s9 11 12 17c2 7 4 14 4 21z">
          <text:p/>
        </draw:path>
        <draw:path draw:style-name="gr4" draw:text-style-name="P5" draw:layer="layout" svg:width="0.106cm" svg:height="0.105cm" svg:x="10.927cm" svg:y="10.009cm" svg:viewBox="0 0 107 106" svg:d="M107 53c0 7-2 14-4 21-3 6-7 12-12 17s-11 9-17 11c-7 3-13 4-20 4s-15-1-22-4c-6-2-12-6-17-11s-8-11-11-17c-3-7-4-14-4-21s1-13 4-20c3-6 6-12 11-18 5-5 11-9 17-11 7-3 15-4 22-4s13 1 20 4c6 2 12 6 17 11 5 6 9 12 12 18 2 7 4 13 4 20z">
          <text:p/>
        </draw:path>
        <draw:path draw:style-name="gr4" draw:text-style-name="P5" draw:layer="layout" svg:width="0.106cm" svg:height="0.106cm" svg:x="10.927cm" svg:y="10.511cm" svg:viewBox="0 0 107 107" svg:d="M107 54c0 7-2 14-4 20-3 7-7 13-12 18s-11 8-17 11c-7 3-13 4-20 4s-15-1-22-4c-6-3-12-6-17-11s-8-11-11-18c-3-6-4-13-4-20s1-15 4-21c3-7 6-12 11-17s11-9 17-12c7-2 15-4 22-4s13 2 20 4c6 3 12 7 17 12s9 10 12 17c2 6 4 14 4 21z">
          <text:p/>
        </draw:path>
        <draw:path draw:style-name="gr4" draw:text-style-name="P5" draw:layer="layout" svg:width="0.106cm" svg:height="0.106cm" svg:x="10.927cm" svg:y="11.966cm" svg:viewBox="0 0 107 107" svg:d="M107 53c0 8-2 15-4 22-3 6-7 12-12 17s-11 9-17 11c-7 3-13 4-20 4s-15-1-22-4c-6-2-12-6-17-11s-8-11-11-17c-3-7-4-14-4-22 0-7 1-13 4-20 3-6 6-12 11-17s11-9 17-12c7-2 15-4 22-4s13 2 20 4c6 3 12 7 17 12s9 11 12 17c2 7 4 13 4 20z">
          <text:p/>
        </draw:path>
        <draw:path draw:style-name="gr4" draw:text-style-name="P5" draw:layer="layout" svg:width="0.106cm" svg:height="0.106cm" svg:x="10.927cm" svg:y="12.469cm" svg:viewBox="0 0 107 107" svg:d="M107 53c0 7-2 14-4 20-3 8-7 14-12 18-5 5-11 9-17 12-7 3-13 4-20 4s-15-1-22-4c-6-3-12-7-17-12-5-4-8-10-11-18-3-6-4-13-4-20s1-14 4-20c3-7 6-12 11-17s11-9 17-12c7-3 15-4 22-4s13 1 20 4c6 3 12 7 17 12s9 10 12 17c2 6 4 13 4 20z">
          <text:p/>
        </draw:path>
        <draw:path draw:style-name="gr4" draw:text-style-name="P5" draw:layer="layout" svg:width="0.106cm" svg:height="0.106cm" svg:x="10.927cm" svg:y="12.972cm" svg:viewBox="0 0 107 107" svg:d="M107 53c0 7-2 14-4 20-3 6-7 12-12 17s-11 9-17 13c-7 2-13 4-20 4s-15-2-22-4c-6-4-12-8-17-13s-8-11-11-17-4-13-4-20 1-14 4-20c3-7 6-13 11-18s11-8 17-11c7-3 15-4 22-4s13 1 20 4c6 3 12 6 17 11s9 11 12 18c2 6 4 13 4 20z">
          <text:p/>
        </draw:path>
        <draw:path draw:style-name="gr4" draw:text-style-name="P5" draw:layer="layout" svg:width="0.106cm" svg:height="0.105cm" svg:x="10.927cm" svg:y="13.475cm" svg:viewBox="0 0 107 106" svg:d="M107 53c0 7-2 14-4 21-3 6-7 12-12 17s-11 9-17 11c-7 3-13 4-20 4s-15-1-22-4c-6-2-12-6-17-11s-8-11-11-17c-3-7-4-14-4-21s1-13 4-20c3-6 6-12 11-18 5-5 11-9 17-11 7-3 15-4 22-4s13 1 20 4c6 2 12 6 17 11 5 6 9 12 12 18 2 7 4 13 4 20z">
          <text:p/>
        </draw:path>
        <draw:path draw:style-name="gr4" draw:text-style-name="P5" draw:layer="layout" svg:width="0.106cm" svg:height="0.106cm" svg:x="10.927cm" svg:y="13.977cm" svg:viewBox="0 0 107 107" svg:d="M107 54c0 7-2 14-4 20-3 7-7 13-12 18s-11 8-17 11c-7 3-13 4-20 4s-15-1-22-4c-6-3-12-6-17-11s-8-11-11-18c-3-6-4-13-4-20s1-15 4-21c3-7 6-12 11-17s11-9 17-12c7-2 15-4 22-4s13 2 20 4c6 3 12 7 17 12s9 10 12 17c2 6 4 14 4 21z">
          <text:p/>
        </draw:path>
        <draw:path draw:style-name="gr4" draw:text-style-name="P5" draw:layer="layout" svg:width="0.106cm" svg:height="0.106cm" svg:x="10.927cm" svg:y="14.48cm" svg:viewBox="0 0 107 107" svg:d="M107 53c0 7-2 15-4 21-3 7-7 12-12 17s-11 9-17 12c-7 2-13 4-20 4s-15-2-22-4c-6-3-12-7-17-12s-8-10-11-17c-3-6-4-14-4-21s1-14 4-20c3-7 6-13 11-18 5-4 11-8 17-11 7-3 15-4 22-4s13 1 20 4c6 3 12 7 17 11 5 5 9 11 12 18 2 6 4 13 4 20z">
          <text:p/>
        </draw:path>
        <draw:frame draw:style-name="gr5" draw:text-style-name="P6" draw:layer="layout" svg:width="17.024cm" svg:height="0.53cm" svg:x="1.6cm" svg:y="26.626cm">
          <draw:text-box>
            <text:p text:style-name="P2"><text:span text:style-name="T3">Participated </text:span><text:span text:style-name="T3">in the </text:span><text:span text:style-name="T3">university </text:span><text:span text:style-name="T3">innovation </text:span><text:span text:style-name="T3">competition </text:span><text:span text:style-name="T3">developing </text:span><text:span text:style-name="T3">technology-</text:span><text:span text:style-name="T3">driven </text:span><text:span text:style-name="T3">solutions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5" draw:text-style-name="P6" draw:layer="layout" svg:width="16.593cm" svg:height="0.53cm" svg:x="1.6cm" svg:y="1.464cm">
          <draw:text-box>
            <text:p text:style-name="P2"><text:span text:style-name="T6">Entreprene</text:span><text:span text:style-name="T6">urship </text:span><text:span text:style-name="T6">Sandbox </text:span><text:span text:style-name="T6">Summer </text:span><text:span text:style-name="T6">Hackathon, </text:span><text:span text:style-name="T7">Ontario Tech </text:span><text:span text:style-name="T7">University </text:span><text:span text:style-name="T7">(Brilliant </text:span><text:span text:style-name="T7">Catalyst)</text:span></text:p>
          </draw:text-box>
        </draw:frame>
        <draw:frame draw:style-name="gr5" draw:text-style-name="P6" draw:layer="layout" svg:width="15.195cm" svg:height="0.53cm" svg:x="1.6cm" svg:y="1.967cm">
          <draw:text-box>
            <text:p text:style-name="P2"><text:span text:style-name="T3">Collaborate</text:span><text:span text:style-name="T3">d with </text:span><text:span text:style-name="T3">multidiscipli</text:span><text:span text:style-name="T3">nary teams </text:span><text:span text:style-name="T3">to develop </text:span><text:span text:style-name="T3">innovative </text:span><text:span text:style-name="T3">software </text:span><text:span text:style-name="T3">solutions.</text:span></text:p>
          </draw:text-box>
        </draw:frame>
        <draw:frame draw:style-name="gr5" draw:text-style-name="P6" draw:layer="layout" svg:width="5.692cm" svg:height="0.53cm" svg:x="1.6cm" svg:y="2.787cm">
          <draw:text-box>
            <text:p text:style-name="P2"><text:span text:style-name="T6">EO Robotics </text:span><text:span text:style-name="T6">STEM </text:span><text:span text:style-name="T6">Workshops</text:span></text:p>
          </draw:text-box>
        </draw:frame>
        <draw:frame draw:style-name="gr5" draw:text-style-name="P6" draw:layer="layout" svg:width="16.487cm" svg:height="0.53cm" svg:x="1.6cm" svg:y="3.29cm">
          <draw:text-box>
            <text:p text:style-name="P2"><text:span text:style-name="T3">Completed </text:span><text:span text:style-name="T3">practical </text:span><text:span text:style-name="T3">robotics and </text:span><text:span text:style-name="T3">embedded </text:span><text:span text:style-name="T3">systems </text:span><text:span text:style-name="T3">training </text:span><text:span text:style-name="T3">using </text:span><text:span text:style-name="T3">Arduino </text:span><text:span text:style-name="T3">technologie</text:span><text:span text:style-name="T3">s.</text:span></text:p>
          </draw:text-box>
        </draw:frame>
        <draw:frame draw:style-name="gr5" draw:text-style-name="P6" draw:layer="layout" svg:width="3.156cm" svg:height="0.53cm" svg:x="1.6cm" svg:y="4.11cm">
          <draw:text-box>
            <text:p text:style-name="P2"><text:span text:style-name="T6">Web3 </text:span><text:span text:style-name="T6">Bootcamp</text:span></text:p>
          </draw:text-box>
        </draw:frame>
        <draw:polygon draw:style-name="gr4" draw:text-style-name="P5" draw:layer="layout" svg:width="17.806cm" svg:height="0.053cm" svg:x="1.587cm" svg:y="6.27cm" svg:viewBox="0 0 17807 54" draw:points="0,0 17807,0 17807,54 0,54">
          <text:p/>
        </draw:polygon>
        <draw:frame draw:style-name="gr5" draw:text-style-name="P6" draw:layer="layout" svg:width="14.925cm" svg:height="0.53cm" svg:x="1.6cm" svg:y="4.612cm">
          <draw:text-box>
            <text:p text:style-name="P2"><text:span text:style-name="T3">Studied </text:span><text:span text:style-name="T3">blockchain </text:span><text:span text:style-name="T3">fundamenta</text:span><text:span text:style-name="T3">ls and smart </text:span><text:span text:style-name="T3">contract </text:span><text:span text:style-name="T3">developmen</text:span><text:span text:style-name="T3">t using </text:span><text:span text:style-name="T3">Motoko.</text:span></text:p>
          </draw:text-box>
        </draw:frame>
        <draw:frame draw:style-name="gr7" draw:text-style-name="P8" draw:layer="layout" svg:width="1.581cm" svg:height="0.577cm" svg:x="1.6cm" svg:y="5.659cm">
          <draw:text-box>
            <text:p text:style-name="P2"><text:span text:style-name="T5">Awards</text:span></text:p>
          </draw:text-box>
        </draw:frame>
        <draw:frame draw:style-name="gr5" draw:text-style-name="P6" draw:layer="layout" svg:width="2.699cm" svg:height="0.53cm" svg:x="1.6cm" svg:y="6.517cm">
          <draw:text-box>
            <text:p text:style-name="P2"><text:span text:style-name="T6">Mukali </text:span><text:span text:style-name="T6">Award</text:span></text:p>
          </draw:text-box>
        </draw:frame>
        <draw:polygon draw:style-name="gr4" draw:text-style-name="P5" draw:layer="layout" svg:width="17.806cm" svg:height="0.053cm" svg:x="1.587cm" svg:y="8.678cm" svg:viewBox="0 0 17807 54" draw:points="0,0 17807,0 17807,54 0,54">
          <text:p/>
        </draw:polygon>
        <draw:frame draw:style-name="gr5" draw:text-style-name="P6" draw:layer="layout" svg:width="14.527cm" svg:height="0.53cm" svg:x="1.6cm" svg:y="7.02cm">
          <draw:text-box>
            <text:p text:style-name="P2"><text:span text:style-name="T3">Awarded for </text:span><text:span text:style-name="T3">exceptional </text:span><text:span text:style-name="T3">performanc</text:span><text:span text:style-name="T3">e as a top-</text:span><text:span text:style-name="T3">performing </text:span><text:span text:style-name="T3">broadband </text:span><text:span text:style-name="T3">installer.</text:span></text:p>
          </draw:text-box>
        </draw:frame>
        <draw:path draw:style-name="gr4" draw:text-style-name="P5" draw:layer="layout" svg:width="0.106cm" svg:height="0.105cm" svg:x="1.64cm" svg:y="9.181cm" svg:viewBox="0 0 107 106" svg:d="M107 53c0 7-2 14-4 21-3 6-7 12-13 17-5 5-10 9-17 11-6 3-13 4-20 4s-14-1-20-4c-7-2-13-6-18-11s-8-11-11-17c-3-7-4-14-4-21s1-13 4-20c3-6 6-12 11-17s11-10 18-12c6-3 13-4 20-4s14 1 20 4c7 2 12 7 17 12 6 5 10 11 13 17 2 7 4 13 4 20z">
          <text:p/>
        </draw:path>
        <draw:frame draw:style-name="gr7" draw:text-style-name="P8" draw:layer="layout" svg:width="4.07cm" svg:height="0.577cm" svg:x="1.6cm" svg:y="8.067cm">
          <draw:text-box>
            <text:p text:style-name="P2"><text:span text:style-name="T5">Core </text:span><text:span text:style-name="T5">Competen</text:span><text:span text:style-name="T5">cies</text:span></text:p>
          </draw:text-box>
        </draw:frame>
        <draw:path draw:style-name="gr4" draw:text-style-name="P5" draw:layer="layout" svg:width="0.106cm" svg:height="0.106cm" svg:x="1.64cm" svg:y="9.948cm" svg:viewBox="0 0 107 107" svg:d="M107 53c0 7-2 14-4 20-3 6-7 13-13 18-5 5-10 9-17 12-6 2-13 4-20 4s-14-2-20-4c-7-3-13-7-18-12s-8-12-11-18-4-13-4-20 1-14 4-21c3-6 6-12 11-17s11-8 18-11c6-3 13-4 20-4s14 1 20 4c7 3 12 6 17 11 6 5 10 11 13 17 2 7 4 14 4 21z">
          <text:p/>
        </draw:path>
        <draw:frame draw:style-name="gr5" draw:text-style-name="P6" draw:layer="layout" svg:width="5.222cm" svg:height="0.53cm" svg:x="1.949cm" svg:y="8.925cm">
          <draw:text-box>
            <text:p text:style-name="P2"><text:span text:style-name="T3">Full-Stack </text:span><text:span text:style-name="T3">Web </text:span><text:span text:style-name="T3">Developme</text:span><text:span text:style-name="T3">nt</text:span></text:p>
          </draw:text-box>
        </draw:frame>
        <draw:path draw:style-name="gr4" draw:text-style-name="P5" draw:layer="layout" svg:width="0.106cm" svg:height="0.106cm" svg:x="1.64cm" svg:y="10.715cm" svg:viewBox="0 0 107 107" svg:d="M107 54c0 7-2 14-4 20-3 7-7 12-13 17-5 5-10 9-17 12-6 3-13 4-20 4s-14-1-20-4c-7-3-13-7-18-12s-8-10-11-17c-3-6-4-13-4-20 0-8 1-15 4-21 3-7 6-12 11-17s11-9 18-12c6-3 13-4 20-4s14 1 20 4c7 3 12 7 17 12 6 5 10 10 13 17 2 6 4 13 4 21z">
          <text:p/>
        </draw:path>
        <draw:frame draw:style-name="gr5" draw:text-style-name="P6" draw:layer="layout" svg:width="3.947cm" svg:height="0.53cm" svg:x="1.949cm" svg:y="9.692cm">
          <draw:text-box>
            <text:p text:style-name="P2"><text:span text:style-name="T3">Software </text:span><text:span text:style-name="T3">Engineering</text:span></text:p>
          </draw:text-box>
        </draw:frame>
        <draw:path draw:style-name="gr4" draw:text-style-name="P5" draw:layer="layout" svg:width="0.106cm" svg:height="0.106cm" svg:x="1.64cm" svg:y="11.482cm" svg:viewBox="0 0 107 107" svg:d="M107 54c0 7-2 14-4 21-3 6-7 12-13 17-5 5-10 9-17 11-6 3-13 4-20 4s-14-1-20-4c-7-2-13-6-18-11s-8-11-11-17c-3-7-4-14-4-21s1-13 4-20c3-6 6-12 11-17 5-6 11-10 18-13 6-2 13-4 20-4s14 2 20 4c7 3 12 7 17 13 6 5 10 11 13 17 2 7 4 13 4 20z">
          <text:p/>
        </draw:path>
        <draw:frame draw:style-name="gr5" draw:text-style-name="P6" draw:layer="layout" svg:width="3.888cm" svg:height="0.53cm" svg:x="1.949cm" svg:y="10.433cm">
          <draw:text-box>
            <text:p text:style-name="P2"><text:span text:style-name="T3">Network </text:span><text:span text:style-name="T3">Engineering</text:span></text:p>
          </draw:text-box>
        </draw:frame>
        <draw:path draw:style-name="gr4" draw:text-style-name="P5" draw:layer="layout" svg:width="0.106cm" svg:height="0.106cm" svg:x="1.64cm" svg:y="12.25cm" svg:viewBox="0 0 107 107" svg:d="M107 53c0 7-2 13-4 20-3 6-7 12-13 18-5 5-10 9-17 12-6 2-13 4-20 4s-14-2-20-4c-7-3-13-7-18-12-5-6-8-12-11-18-3-7-4-13-4-20s1-14 4-21c3-6 6-12 11-17s11-9 18-11c6-3 13-4 20-4s14 1 20 4c7 2 12 6 17 11 6 5 10 11 13 17 2 7 4 14 4 21z">
          <text:p/>
        </draw:path>
        <draw:frame draw:style-name="gr5" draw:text-style-name="P6" draw:layer="layout" svg:width="3.812cm" svg:height="0.53cm" svg:x="1.949cm" svg:y="11.201cm">
          <draw:text-box>
            <text:p text:style-name="P2"><text:span text:style-name="T3">Linux </text:span><text:span text:style-name="T3">Administrati</text:span><text:span text:style-name="T3">on</text:span></text:p>
          </draw:text-box>
        </draw:frame>
        <draw:path draw:style-name="gr4" draw:text-style-name="P5" draw:layer="layout" svg:width="0.106cm" svg:height="0.106cm" svg:x="1.64cm" svg:y="13.017cm" svg:viewBox="0 0 107 107" svg:d="M107 53c0 8-2 15-4 21-3 7-7 12-13 17-5 5-10 9-17 12-6 2-13 4-20 4s-14-2-20-4c-7-3-13-7-18-12s-8-10-11-17c-3-6-4-13-4-21 0-7 1-14 4-20 3-7 6-13 11-18 5-4 11-8 18-11 6-3 13-4 20-4s14 1 20 4c7 3 12 7 17 11 6 5 10 11 13 18 2 6 4 13 4 20z">
          <text:p/>
        </draw:path>
        <draw:frame draw:style-name="gr5" draw:text-style-name="P6" draw:layer="layout" svg:width="2.987cm" svg:height="0.53cm" svg:x="1.949cm" svg:y="11.968cm">
          <draw:text-box>
            <text:p text:style-name="P2"><text:span text:style-name="T3">Problem </text:span><text:span text:style-name="T3">Solving</text:span></text:p>
          </draw:text-box>
        </draw:frame>
        <draw:path draw:style-name="gr4" draw:text-style-name="P5" draw:layer="layout" svg:width="0.106cm" svg:height="0.105cm" svg:x="10.953cm" svg:y="9.181cm" svg:viewBox="0 0 107 106" svg:d="M107 53c0 7-1 14-4 21-3 6-6 12-11 17s-11 9-18 11c-6 3-13 4-20 4s-14-1-20-4c-7-2-12-6-18-11-5-5-9-11-12-17-2-7-4-14-4-21s2-13 4-20c3-6 7-12 12-17 6-5 11-10 18-12 6-3 13-4 20-4s14 1 20 4c7 2 13 7 18 12s8 11 11 17c3 7 4 13 4 20z">
          <text:p/>
        </draw:path>
        <draw:frame draw:style-name="gr5" draw:text-style-name="P6" draw:layer="layout" svg:width="3.592cm" svg:height="0.53cm" svg:x="1.949cm" svg:y="12.735cm">
          <draw:text-box>
            <text:p text:style-name="P2"><text:span text:style-name="T3">Team </text:span><text:span text:style-name="T3">Collaboratio</text:span><text:span text:style-name="T3">n</text:span></text:p>
          </draw:text-box>
        </draw:frame>
        <draw:path draw:style-name="gr4" draw:text-style-name="P5" draw:layer="layout" svg:width="0.106cm" svg:height="0.106cm" svg:x="10.953cm" svg:y="9.948cm" svg:viewBox="0 0 107 107" svg:d="M107 53c0 7-1 14-4 20s-6 13-11 18-11 9-18 12c-6 2-13 4-20 4s-14-2-20-4c-7-3-12-7-18-12-5-5-9-12-12-18-2-6-4-13-4-20s2-14 4-21c3-6 7-12 12-17 6-5 11-8 18-11 6-3 13-4 20-4s14 1 20 4c7 3 13 6 18 11s8 11 11 17c3 7 4 14 4 21z">
          <text:p/>
        </draw:path>
        <draw:frame draw:style-name="gr5" draw:text-style-name="P6" draw:layer="layout" svg:width="4.345cm" svg:height="0.53cm" svg:x="11.237cm" svg:y="8.925cm">
          <draw:text-box>
            <text:p text:style-name="P2"><text:span text:style-name="T3">JavaScript </text:span><text:span text:style-name="T3">Developme</text:span><text:span text:style-name="T3">nt</text:span></text:p>
          </draw:text-box>
        </draw:frame>
        <draw:path draw:style-name="gr4" draw:text-style-name="P5" draw:layer="layout" svg:width="0.106cm" svg:height="0.106cm" svg:x="10.953cm" svg:y="10.715cm" svg:viewBox="0 0 107 107" svg:d="M107 54c0 7-1 14-4 20-3 7-6 12-11 17s-11 9-18 12c-6 3-13 4-20 4s-14-1-20-4c-7-3-12-7-18-12-5-5-9-10-12-17-2-6-4-13-4-20 0-8 2-15 4-21 3-7 7-12 12-17 6-5 11-9 18-12 6-3 13-4 20-4s14 1 20 4c7 3 13 7 18 12s8 10 11 17c3 6 4 13 4 21z">
          <text:p/>
        </draw:path>
        <draw:frame draw:style-name="gr5" draw:text-style-name="P6" draw:layer="layout" svg:width="4.172cm" svg:height="0.53cm" svg:x="11.237cm" svg:y="9.692cm">
          <draw:text-box>
            <text:p text:style-name="P2"><text:span text:style-name="T3">REST API </text:span><text:span text:style-name="T3">Developme</text:span><text:span text:style-name="T3">nt</text:span></text:p>
          </draw:text-box>
        </draw:frame>
        <draw:path draw:style-name="gr4" draw:text-style-name="P5" draw:layer="layout" svg:width="0.106cm" svg:height="0.106cm" svg:x="10.953cm" svg:y="11.482cm" svg:viewBox="0 0 107 107" svg:d="M107 54c0 7-1 14-4 21-3 6-6 12-11 17s-11 9-18 11c-6 3-13 4-20 4s-14-1-20-4c-7-2-12-6-18-11-5-5-9-11-12-17-2-7-4-14-4-21s2-13 4-20c3-6 7-12 12-17 6-6 11-10 18-13 6-2 13-4 20-4s14 2 20 4c7 3 13 7 18 13 5 5 8 11 11 17 3 7 4 13 4 20z">
          <text:p/>
        </draw:path>
        <draw:frame draw:style-name="gr5" draw:text-style-name="P6" draw:layer="layout" svg:width="3.211cm" svg:height="0.53cm" svg:x="11.237cm" svg:y="10.433cm">
          <draw:text-box>
            <text:p text:style-name="P2"><text:span text:style-name="T3">Cloud </text:span><text:span text:style-name="T3">Computing</text:span></text:p>
          </draw:text-box>
        </draw:frame>
        <draw:path draw:style-name="gr4" draw:text-style-name="P5" draw:layer="layout" svg:width="0.106cm" svg:height="0.106cm" svg:x="10.953cm" svg:y="12.25cm" svg:viewBox="0 0 107 107" svg:d="M107 53c0 7-1 13-4 20-3 6-6 12-11 18-5 5-11 9-18 12-6 2-13 4-20 4s-14-2-20-4c-7-3-12-7-18-12-5-6-9-12-12-18-2-7-4-13-4-20s2-14 4-21c3-6 7-12 12-17 6-5 11-9 18-11 6-3 13-4 20-4s14 1 20 4c7 2 13 6 18 11s8 11 11 17c3 7 4 14 4 21z">
          <text:p/>
        </draw:path>
        <draw:frame draw:style-name="gr5" draw:text-style-name="P6" draw:layer="layout" svg:width="3.097cm" svg:height="0.53cm" svg:x="11.237cm" svg:y="11.201cm">
          <draw:text-box>
            <text:p text:style-name="P2"><text:span text:style-name="T3">Database </text:span><text:span text:style-name="T3">Design</text:span></text:p>
          </draw:text-box>
        </draw:frame>
        <draw:path draw:style-name="gr4" draw:text-style-name="P5" draw:layer="layout" svg:width="0.106cm" svg:height="0.106cm" svg:x="10.953cm" svg:y="13.017cm" svg:viewBox="0 0 107 107" svg:d="M107 53c0 8-1 15-4 21-3 7-6 12-11 17s-11 9-18 12c-6 2-13 4-20 4s-14-2-20-4c-7-3-12-7-18-12-5-5-9-10-12-17-2-6-4-13-4-21 0-7 2-14 4-20 3-7 7-13 12-18 6-4 11-8 18-11 6-3 13-4 20-4s14 1 20 4c7 3 13 7 18 11 5 5 8 11 11 18 3 6 4 13 4 20z">
          <text:p/>
        </draw:path>
        <draw:frame draw:style-name="gr5" draw:text-style-name="P6" draw:layer="layout" svg:width="4.659cm" svg:height="0.53cm" svg:x="11.237cm" svg:y="11.968cm">
          <draw:text-box>
            <text:p text:style-name="P2"><text:span text:style-name="T3">Technical </text:span><text:span text:style-name="T3">Documentat</text:span><text:span text:style-name="T3">ion</text:span></text:p>
          </draw:text-box>
        </draw:frame>
        <draw:polygon draw:style-name="gr4" draw:text-style-name="P5" draw:layer="layout" svg:width="17.806cm" svg:height="0.053cm" svg:x="1.587cm" svg:y="14.393cm" svg:viewBox="0 0 17807 54" draw:points="0,0 17807,0 17807,54 0,54">
          <text:p/>
        </draw:polygon>
        <draw:frame draw:style-name="gr5" draw:text-style-name="P6" draw:layer="layout" svg:width="3.368cm" svg:height="0.53cm" svg:x="11.237cm" svg:y="12.735cm">
          <draw:text-box>
            <text:p text:style-name="P2"><text:span text:style-name="T3">Customer </text:span><text:span text:style-name="T3">Support</text:span></text:p>
          </draw:text-box>
        </draw:frame>
        <draw:frame draw:style-name="gr7" draw:text-style-name="P8" draw:layer="layout" svg:width="2.305cm" svg:height="0.577cm" svg:x="1.6cm" svg:y="13.782cm">
          <draw:text-box>
            <text:p text:style-name="P2"><text:span text:style-name="T5">Languages</text:span></text:p>
          </draw:text-box>
        </draw:frame>
        <draw:frame draw:style-name="gr5" draw:text-style-name="P6" draw:layer="layout" svg:width="1.407cm" svg:height="0.53cm" svg:x="1.6cm" svg:y="14.64cm">
          <draw:text-box>
            <text:p text:style-name="P2"><text:span text:style-name="T6">English</text:span></text:p>
          </draw:text-box>
        </draw:frame>
        <draw:frame draw:style-name="gr5" draw:text-style-name="P6" draw:layer="layout" svg:width="1.145cm" svg:height="0.53cm" svg:x="1.6cm" svg:y="15.143cm">
          <draw:text-box>
            <text:p text:style-name="P2"><text:span text:style-name="T3">Fluent</text:span></text:p>
          </draw:text-box>
        </draw:frame>
        <draw:frame draw:style-name="gr5" draw:text-style-name="P6" draw:layer="layout" svg:width="1.382cm" svg:height="0.53cm" svg:x="7.792cm" svg:y="14.64cm">
          <draw:text-box>
            <text:p text:style-name="P2"><text:span text:style-name="T6">Nyanja</text:span></text:p>
          </draw:text-box>
        </draw:frame>
        <draw:frame draw:style-name="gr5" draw:text-style-name="P6" draw:layer="layout" svg:width="1.145cm" svg:height="0.53cm" svg:x="7.792cm" svg:y="15.143cm">
          <draw:text-box>
            <text:p text:style-name="P2"><text:span text:style-name="T3">Fluent</text:span></text:p>
          </draw:text-box>
        </draw:frame>
        <draw:frame draw:style-name="gr5" draw:text-style-name="P6" draw:layer="layout" svg:width="1.357cm" svg:height="0.53cm" svg:x="13.984cm" svg:y="14.64cm">
          <draw:text-box>
            <text:p text:style-name="P2"><text:span text:style-name="T6">Bemba</text:span></text:p>
          </draw:text-box>
        </draw:frame>
        <draw:polygon draw:style-name="gr4" draw:text-style-name="P5" draw:layer="layout" svg:width="17.806cm" svg:height="0.052cm" svg:x="1.587cm" svg:y="16.801cm" svg:viewBox="0 0 17807 53" draw:points="0,0 17807,0 17807,53 0,53">
          <text:p/>
        </draw:polygon>
        <draw:frame draw:style-name="gr5" draw:text-style-name="P6" draw:layer="layout" svg:width="2.741cm" svg:height="0.53cm" svg:x="13.984cm" svg:y="15.143cm">
          <draw:text-box>
            <text:p text:style-name="P2"><text:span text:style-name="T3">Conversatio</text:span><text:span text:style-name="T3">nal</text:span></text:p>
          </draw:text-box>
        </draw:frame>
        <draw:frame draw:style-name="gr7" draw:text-style-name="P8" draw:layer="layout" svg:width="2.343cm" svg:height="0.577cm" svg:x="1.6cm" svg:y="16.19cm">
          <draw:text-box>
            <text:p text:style-name="P2"><text:span text:style-name="T5">References</text:span></text:p>
          </draw:text-box>
        </draw:frame>
        <draw:frame draw:style-name="gr5" draw:text-style-name="P6" draw:layer="layout" svg:width="4.608cm" svg:height="0.53cm" svg:x="1.6cm" svg:y="17.021cm">
          <draw:text-box>
            <text:p text:style-name="P2"><text:span text:style-name="T6">Available </text:span><text:span text:style-name="T6">upon </text:span><text:span text:style-name="T6">request.</text:span></text:p>
          </draw:text-box>
        </draw:frame>
        <draw:frame draw:style-name="gr8" draw:text-style-name="P9" draw:layer="layout" svg:width="20.987cm" svg:height="12.7cm" svg:x="0.001cm" svg:y="18.415cm">
          <draw:image xlink:href="Pictures/10000001000003EF000002AA07518D74.png" xlink:type="simple" xlink:show="embed" xlink:actuate="onLoad" draw:mime-type="image/png">
            <text:p/>
          </draw:image>
        </draw:frame>
        <draw:frame draw:style-name="gr8" draw:text-style-name="P9" draw:layer="layout" svg:width="20.987cm" svg:height="14.213cm" svg:x="0cm" svg:y="30.338cm">
          <draw:image xlink:href="Pictures/10000001000003EF000002AA0D3549DD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8" draw:text-style-name="P9" draw:layer="layout" svg:width="20.987cm" svg:height="14.213cm" svg:x="0.001cm" svg:y="0.074cm">
          <draw:image xlink:href="Pictures/10000001000003EF000002AA2BFAB8DC.png" xlink:type="simple" xlink:show="embed" xlink:actuate="onLoad" draw:mime-type="image/png">
            <text:p/>
          </draw:image>
        </draw:frame>
        <draw:frame draw:style-name="gr8" draw:text-style-name="P9" draw:layer="layout" svg:width="20.987cm" svg:height="14.213cm" svg:x="0cm" svg:y="13.97cm">
          <draw:image xlink:href="Pictures/10000001000003EF000002AAB8C8C38B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8" draw:text-style-name="P9" draw:layer="layout" svg:width="20.987cm" svg:height="14.213cm" svg:x="0.001cm" svg:y="0.074cm">
          <draw:image xlink:href="Pictures/10000001000003EF000002AA64A659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SansPro" svg:font-family="SourceSansPr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9T21:39:24.405113429</dc:date>
    <meta:editing-duration>PT16M59S</meta:editing-duration>
    <meta:editing-cycles>1</meta:editing-cycles>
    <meta:document-statistic meta:object-count="283"/>
    <meta:generator>LibreOffice/24.2.7.2$Linux_X86_64 LibreOffice_project/420$Build-2</meta:generator>
  </office:meta>
</office:document-meta>
</file>